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2BCCB975533.png" manifest:media-type="image/png"/>
  <manifest:file-entry manifest:full-path="Pictures/10000000000004B0000002BCE601D4D8.png" manifest:media-type="image/png"/>
  <manifest:file-entry manifest:full-path="Pictures/10000000000004B0000002BCA86A531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cm" svg:stroke-color="#fafaf7" draw:fill-color="#fafaf7" draw:textarea-horizontal-align="center" draw:textarea-vertical-align="middle" loext:decorative="false"/>
    </style:style>
    <style:style style:name="gr2" style:family="graphic" style:parent-style-name="standard">
      <style:graphic-properties svg:stroke-width="0cm" svg:stroke-color="#243746" draw:fill-color="#243746" draw:textarea-horizontal-align="center" draw:textarea-vertical-align="middle" loext:decorative="false"/>
    </style:style>
    <style:style style:name="gr3" style:family="graphic" style:parent-style-name="standard">
      <style:graphic-properties svg:stroke-width="0cm" svg:stroke-color="#2b5f7a" draw:fill-color="#2b5f7a" draw:textarea-horizontal-align="center" draw:textarea-vertical-align="middle" loext:decorative="false"/>
    </style:style>
    <style:style style:name="gr4" style:family="graphic" style:parent-style-name="standard">
      <style:graphic-properties draw:stroke="none" draw:fill="none" draw:fill-color="#ffffff" fo:min-height="0.19cm" fo:padding-top="0.07cm" fo:padding-bottom="0.07cm" fo:padding-left="0.07cm" fo:padding-right="0.07cm" loext:decorative="false"/>
      <style:paragraph-properties style:writing-mode="lr-tb"/>
    </style:style>
    <style:style style:name="gr5" style:family="graphic" style:parent-style-name="standard">
      <style:graphic-properties svg:stroke-width="0cm" svg:stroke-color="#cbd3d9" draw:fill-color="#cbd3d9" draw:textarea-horizontal-align="center" draw:textarea-vertical-align="middle" loext:decorative="false"/>
    </style:style>
    <style:style style:name="gr6" style:family="graphic" style:parent-style-name="standard">
      <style:graphic-properties svg:stroke-width="0.03cm" svg:stroke-color="#2b5f7a" draw:fill-color="#fafaf7" draw:textarea-horizontal-align="center" draw:textarea-vertical-align="middle" fo:padding-top="0.14cm" fo:padding-bottom="0.14cm" fo:padding-left="0.265cm" fo:padding-right="0.265cm" loext:decorative="false"/>
    </style:style>
    <style:style style:name="gr7" style:family="graphic" style:parent-style-name="standard">
      <style:graphic-properties draw:stroke="none" draw:fill="none" draw:fill-color="#ffffff" fo:min-height="0.13cm" fo:padding-top="0.02cm" fo:padding-bottom="0.02cm" fo:padding-left="0.02cm" fo:padding-right="0.02cm" loext:decorative="false"/>
      <style:paragraph-properties style:writing-mode="lr-tb"/>
    </style:style>
    <style:style style:name="gr8" style:family="graphic" style:parent-style-name="standard">
      <style:graphic-properties draw:stroke="none" draw:fill="none" draw:fill-color="#ffffff" fo:min-height="3.35cm" fo:padding-top="0.07cm" fo:padding-bottom="0.07cm" fo:padding-left="0.07cm" fo:padding-right="0.07cm" loext:decorative="false"/>
      <style:paragraph-properties style:writing-mode="lr-tb"/>
    </style:style>
    <style:style style:name="gr9" style:family="graphic" style:parent-style-name="standard">
      <style:graphic-properties draw:stroke="none" draw:fill="none" draw:fill-color="#ffffff" fo:min-height="1.35cm" fo:padding-top="0.07cm" fo:padding-bottom="0.07cm" fo:padding-left="0.07cm" fo:padding-right="0.07cm" loext:decorative="false"/>
      <style:paragraph-properties style:writing-mode="lr-tb"/>
    </style:style>
    <style:style style:name="gr10" style:family="graphic" style:parent-style-name="standard">
      <style:graphic-properties svg:stroke-width="0cm" svg:stroke-color="#f0f3f5" draw:fill-color="#f0f3f5" draw:textarea-horizontal-align="center" draw:textarea-vertical-align="middle" loext:decorative="false"/>
    </style:style>
    <style:style style:name="gr11" style:family="graphic" style:parent-style-name="standard">
      <style:graphic-properties draw:stroke="none" draw:fill="none" draw:fill-color="#ffffff" fo:min-height="0.75cm" fo:padding-top="0.07cm" fo:padding-bottom="0.07cm" fo:padding-left="0.07cm" fo:padding-right="0.07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fill-color="#ffffff" fo:min-height="0.55cm" fo:padding-top="0.07cm" fo:padding-bottom="0.07cm" fo:padding-left="0.07cm" fo:padding-right="0.07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fill-color="#ffffff" fo:min-height="0.95cm" fo:padding-top="0.07cm" fo:padding-bottom="0.07cm" fo:padding-left="0.07cm" fo:padding-right="0.07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fill-color="#ffffff" fo:min-height="0.5cm" fo:padding-top="0.07cm" fo:padding-bottom="0.07cm" fo:padding-left="0.07cm" fo:padding-right="0.07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fill-color="#ffffff" fo:min-height="0.25cm" fo:padding-top="0.07cm" fo:padding-bottom="0.07cm" fo:padding-left="0.07cm" fo:padding-right="0.07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fill-color="#ffffff" fo:min-height="0.22cm" fo:padding-top="0.02cm" fo:padding-bottom="0.02cm" fo:padding-left="0.02cm" fo:padding-right="0.02cm" loext:decorative="false"/>
      <style:paragraph-properties style:writing-mode="lr-tb"/>
    </style:style>
    <style:style style:name="gr17" style:family="graphic" style:parent-style-name="standard">
      <style:graphic-properties svg:stroke-width="0cm" svg:stroke-color="#856a34" draw:fill-color="#856a34" draw:textarea-horizontal-align="center" draw:textarea-vertical-align="middle" loext:decorative="false"/>
    </style:style>
    <style:style style:name="gr18" style:family="graphic" style:parent-style-name="standard">
      <style:graphic-properties draw:stroke="none" draw:fill="none" draw:fill-color="#ffffff" fo:min-height="0.4cm" fo:padding-top="0.07cm" fo:padding-bottom="0.07cm" fo:padding-left="0.07cm" fo:padding-right="0.07cm" loext:decorative="false"/>
      <style:paragraph-properties style:writing-mode="lr-tb"/>
    </style:style>
    <style:style style:name="gr19" style:family="graphic">
      <style:graphic-properties style:protect="size" loext:decorative="false"/>
    </style:style>
    <style:style style:name="gr20" style:family="graphic" style:parent-style-name="standard">
      <style:graphic-properties draw:stroke="none" draw:fill="none" draw:fill-color="#ffffff" fo:min-height="0.937cm" fo:padding-top="0.07cm" fo:padding-bottom="0.07cm" fo:padding-left="0.07cm" fo:padding-right="0.07cm" loext:decorative="false"/>
      <style:paragraph-properties style:writing-mode="lr-tb"/>
    </style:style>
    <style:style style:name="gr21" style:family="graphic" style:parent-style-name="standard">
      <style:graphic-properties svg:stroke-width="0.09cm" svg:stroke-color="#2b5f7a" draw:marker-end="" draw:textarea-horizontal-align="center" draw:textarea-vertical-align="middle" fo:padding-top="0.17cm" fo:padding-bottom="0.17cm" fo:padding-left="0.295cm" fo:padding-right="0.295cm" loext:decorative="false"/>
    </style:style>
    <style:style style:name="gr22" style:family="graphic" style:parent-style-name="standard">
      <style:graphic-properties svg:stroke-width="0.09cm" svg:stroke-color="#856a34" draw:marker-end="" draw:textarea-horizontal-align="center" draw:textarea-vertical-align="middle" fo:padding-top="0.17cm" fo:padding-bottom="0.17cm" fo:padding-left="0.295cm" fo:padding-right="0.295cm" loext:decorative="false"/>
    </style:style>
    <style:style style:name="gr23" style:family="graphic" style:parent-style-name="standard">
      <style:graphic-properties svg:stroke-width="0.09cm" svg:stroke-color="#4f7392" draw:marker-end="" draw:textarea-horizontal-align="center" draw:textarea-vertical-align="middle" fo:padding-top="0.17cm" fo:padding-bottom="0.17cm" fo:padding-left="0.295cm" fo:padding-right="0.295cm" loext:decorative="false"/>
    </style:style>
    <style:style style:name="gr24" style:family="graphic" style:parent-style-name="standard">
      <style:graphic-properties svg:stroke-width="0.03cm" svg:stroke-color="#cbd3d9" draw:fill-color="#f0f3f5" draw:textarea-horizontal-align="center" draw:textarea-vertical-align="middle" fo:padding-top="0.14cm" fo:padding-bottom="0.14cm" fo:padding-left="0.265cm" fo:padding-right="0.265cm" loext:decorative="false"/>
    </style:style>
    <style:style style:name="gr25" style:family="graphic" style:parent-style-name="standard">
      <style:graphic-properties svg:stroke-width="0cm" svg:stroke-color="#47705d" draw:fill-color="#47705d" draw:textarea-horizontal-align="center" draw:textarea-vertical-align="middle" loext:decorative="false"/>
    </style:style>
    <style:style style:name="gr26" style:family="graphic" style:parent-style-name="standard">
      <style:graphic-properties svg:stroke-width="0cm" svg:stroke-color="#4f7392" draw:fill-color="#4f7392" draw:textarea-horizontal-align="center" draw:textarea-vertical-align="middle" loext:decorative="false"/>
    </style:style>
    <style:style style:name="gr27" style:family="graphic" style:parent-style-name="standard">
      <style:graphic-properties svg:stroke-width="0cm" svg:stroke-color="#8c4e4e" draw:fill-color="#8c4e4e" draw:textarea-horizontal-align="center" draw:textarea-vertical-align="middle" loext:decorative="false"/>
    </style:style>
    <style:style style:name="gr28" style:family="graphic" style:parent-style-name="standard">
      <style:graphic-properties svg:stroke-width="0cm" svg:stroke-color="#e5eaee" draw:fill-color="#e5eaee" draw:textarea-horizontal-align="center" draw:textarea-vertical-align="middle" loext:decorative="false"/>
    </style:style>
    <style:style style:name="gr29" style:family="graphic" style:parent-style-name="standard">
      <style:graphic-properties svg:stroke-width="0.03cm" svg:stroke-color="#856a34" draw:fill-color="#fafaf7" draw:textarea-horizontal-align="center" draw:textarea-vertical-align="middle" fo:padding-top="0.14cm" fo:padding-bottom="0.14cm" fo:padding-left="0.265cm" fo:padding-right="0.265cm" loext:decorative="false"/>
    </style:style>
    <style:style style:name="gr30" style:family="graphic" style:parent-style-name="standard">
      <style:graphic-properties draw:stroke="none" draw:fill="none" draw:fill-color="#ffffff" fo:min-height="0.937cm" fo:padding-top="0.02cm" fo:padding-bottom="0.02cm" fo:padding-left="0.02cm" fo:padding-right="0.02cm" loext:decorative="false"/>
      <style:paragraph-properties style:writing-mode="lr-tb"/>
    </style:style>
    <style:style style:name="gr31" style:family="graphic" style:parent-style-name="standard">
      <style:graphic-properties svg:stroke-width="0.09cm" svg:stroke-color="#47705d" draw:marker-end="" draw:textarea-horizontal-align="center" draw:textarea-vertical-align="middle" fo:padding-top="0.17cm" fo:padding-bottom="0.17cm" fo:padding-left="0.295cm" fo:padding-right="0.295cm" loext:decorative="false"/>
    </style:style>
    <style:style style:name="gr32" style:family="graphic" style:parent-style-name="standard">
      <style:graphic-properties svg:stroke-width="0.03cm" svg:stroke-color="#4f7392" draw:fill-color="#fafaf7" draw:textarea-horizontal-align="center" draw:textarea-vertical-align="middle" fo:padding-top="0.14cm" fo:padding-bottom="0.14cm" fo:padding-left="0.265cm" fo:padding-right="0.265cm" loext:decorative="false"/>
    </style:style>
    <style:style style:name="gr33" style:family="graphic" style:parent-style-name="standard">
      <style:graphic-properties svg:stroke-width="0cm" svg:stroke-color="#29485c" draw:fill-color="#29485c" draw:textarea-horizontal-align="center" draw:textarea-vertical-align="middle" loext:decorative="false"/>
    </style:style>
    <style:style style:name="gr34" style:family="graphic" style:parent-style-name="standard">
      <style:graphic-properties svg:stroke-width="0.03cm" svg:stroke-color="#e5eaee" draw:fill-color="#f0f3f5" draw:textarea-horizontal-align="center" draw:textarea-vertical-align="middle" fo:padding-top="0.14cm" fo:padding-bottom="0.14cm" fo:padding-left="0.265cm" fo:padding-right="0.265cm" loext:decorative="false"/>
    </style:style>
    <style:style style:name="gr35" style:family="graphic" style:parent-style-name="standard">
      <style:graphic-properties svg:stroke-width="0.03cm" svg:stroke-color="#e5eaee" draw:fill-color="#e5eaee" draw:textarea-horizontal-align="center" draw:textarea-vertical-align="middle" fo:padding-top="0.14cm" fo:padding-bottom="0.14cm" fo:padding-left="0.265cm" fo:padding-right="0.265cm" loext:decorative="false"/>
    </style:style>
    <style:style style:name="gr36" style:family="graphic" style:parent-style-name="standard">
      <style:graphic-properties svg:stroke-width="0cm" svg:stroke-color="#ffffff" draw:fill-color="#ffffff" draw:textarea-horizontal-align="center" draw:textarea-vertical-align="middle" loext:decorative="false"/>
    </style:style>
    <style:style style:name="gr3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8" style:family="graphic" style:parent-style-name="standard">
      <style:graphic-properties svg:stroke-width="0.03cm" svg:stroke-color="#47705d" draw:fill-color="#fafaf7" draw:textarea-horizontal-align="center" draw:textarea-vertical-align="middle" fo:padding-top="0.14cm" fo:padding-bottom="0.14cm" fo:padding-left="0.265cm" fo:padding-right="0.265cm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-color="#fafaf7"/>
      <style:paragraph-properties fo:text-align="center"/>
    </style:style>
    <style:style style:name="P2" style:family="paragraph">
      <loext:graphic-properties draw:fill-color="#243746"/>
      <style:paragraph-properties fo:text-align="center"/>
    </style:style>
    <style:style style:name="P3" style:family="paragraph">
      <loext:graphic-properties draw:fill-color="#2b5f7a"/>
      <style:paragraph-properties fo:text-align="center"/>
    </style:style>
    <style:style style:name="P4" style:family="paragraph">
      <style:paragraph-properties fo:text-align="start"/>
      <style:text-properties fo:color="#68747d" loext:opacity="100%" style:font-name="Open Sans" fo:font-size="12pt" fo:font-weight="bold"/>
    </style:style>
    <style:style style:name="P5" style:family="paragraph">
      <loext:graphic-properties draw:fill="none" draw:fill-color="#ffffff"/>
      <style:paragraph-properties fo:text-align="start"/>
      <style:text-properties fo:color="#68747d" loext:opacity="100%" style:font-name="Open Sans" fo:font-size="12pt" fo:font-weight="bold"/>
    </style:style>
    <style:style style:name="P6" style:family="paragraph">
      <style:paragraph-properties fo:text-align="start"/>
      <style:text-properties fo:color="#68747d" loext:opacity="100%" style:font-name="Open Sans" fo:font-size="12pt" fo:font-weight="normal"/>
    </style:style>
    <style:style style:name="P7" style:family="paragraph">
      <loext:graphic-properties draw:fill="none" draw:fill-color="#ffffff"/>
      <style:paragraph-properties fo:text-align="start"/>
      <style:text-properties fo:color="#68747d" loext:opacity="100%" style:font-name="Open Sans" fo:font-size="12pt" fo:font-weight="normal"/>
    </style:style>
    <style:style style:name="P8" style:family="paragraph">
      <loext:graphic-properties draw:fill-color="#cbd3d9"/>
      <style:paragraph-properties fo:text-align="center"/>
    </style:style>
    <style:style style:name="P9" style:family="paragraph">
      <style:paragraph-properties fo:text-align="center"/>
      <style:text-properties fo:color="#2b5f7a" loext:opacity="100%" style:font-name="Open Sans" fo:font-size="13pt" fo:font-weight="bold"/>
    </style:style>
    <style:style style:name="P10" style:family="paragraph">
      <loext:graphic-properties draw:fill="none" draw:fill-color="#ffffff"/>
      <style:paragraph-properties fo:text-align="center"/>
      <style:text-properties fo:color="#2b5f7a" loext:opacity="100%" style:font-name="Open Sans" fo:font-size="13pt" fo:font-weight="bold"/>
    </style:style>
    <style:style style:name="P11" style:family="paragraph">
      <style:paragraph-properties fo:text-align="start"/>
      <style:text-properties fo:color="#243746" loext:opacity="100%" style:font-name="Open Sans" fo:font-size="44pt" fo:font-weight="bold"/>
    </style:style>
    <style:style style:name="P12" style:family="paragraph">
      <loext:graphic-properties draw:fill="none" draw:fill-color="#ffffff"/>
      <style:paragraph-properties fo:text-align="start"/>
      <style:text-properties fo:color="#243746" loext:opacity="100%" style:font-name="Open Sans" fo:font-size="44pt" fo:font-weight="bold"/>
    </style:style>
    <style:style style:name="P13" style:family="paragraph">
      <style:paragraph-properties fo:text-align="start"/>
      <style:text-properties fo:color="#68747d" loext:opacity="100%" style:font-name="Open Sans" fo:font-size="21pt" fo:font-weight="normal"/>
    </style:style>
    <style:style style:name="P14" style:family="paragraph">
      <loext:graphic-properties draw:fill="none" draw:fill-color="#ffffff"/>
      <style:paragraph-properties fo:text-align="start"/>
      <style:text-properties fo:color="#68747d" loext:opacity="100%" style:font-name="Open Sans" fo:font-size="21pt" fo:font-weight="normal"/>
    </style:style>
    <style:style style:name="P15" style:family="paragraph">
      <loext:graphic-properties draw:fill-color="#f0f3f5"/>
      <style:paragraph-properties fo:text-align="center"/>
    </style:style>
    <style:style style:name="P16" style:family="paragraph">
      <style:paragraph-properties fo:text-align="center"/>
      <style:text-properties fo:color="#2b5f7a" loext:opacity="100%" style:font-name="Open Sans" fo:font-size="34pt" fo:font-weight="bold"/>
    </style:style>
    <style:style style:name="P17" style:family="paragraph">
      <loext:graphic-properties draw:fill="none" draw:fill-color="#ffffff"/>
      <style:paragraph-properties fo:text-align="center"/>
      <style:text-properties fo:color="#2b5f7a" loext:opacity="100%" style:font-name="Open Sans" fo:font-size="34pt" fo:font-weight="bold"/>
    </style:style>
    <style:style style:name="P18" style:family="paragraph">
      <style:paragraph-properties fo:text-align="center"/>
      <style:text-properties fo:color="#856a34" loext:opacity="100%" style:font-name="Open Sans" fo:font-size="23pt" fo:font-weight="bold"/>
    </style:style>
    <style:style style:name="P19" style:family="paragraph">
      <loext:graphic-properties draw:fill="none" draw:fill-color="#ffffff"/>
      <style:paragraph-properties fo:text-align="center"/>
      <style:text-properties fo:color="#856a34" loext:opacity="100%" style:font-name="Open Sans" fo:font-size="23pt" fo:font-weight="bold"/>
    </style:style>
    <style:style style:name="P20" style:family="paragraph">
      <style:paragraph-properties fo:text-align="center"/>
      <style:text-properties fo:color="#243746" loext:opacity="100%" style:font-name="Open Sans" fo:font-size="20pt" fo:font-weight="bold"/>
    </style:style>
    <style:style style:name="P21" style:family="paragraph">
      <loext:graphic-properties draw:fill="none" draw:fill-color="#ffffff"/>
      <style:paragraph-properties fo:text-align="center"/>
      <style:text-properties fo:color="#243746" loext:opacity="100%" style:font-name="Open Sans" fo:font-size="20pt" fo:font-weight="bold"/>
    </style:style>
    <style:style style:name="P22" style:family="paragraph">
      <style:paragraph-properties fo:text-align="center"/>
      <style:text-properties fo:color="#68747d" loext:opacity="100%" style:font-name="Open Sans" fo:font-size="17pt" fo:font-weight="normal"/>
    </style:style>
    <style:style style:name="P23" style:family="paragraph">
      <loext:graphic-properties draw:fill="none" draw:fill-color="#ffffff"/>
      <style:paragraph-properties fo:text-align="center"/>
      <style:text-properties fo:color="#68747d" loext:opacity="100%" style:font-name="Open Sans" fo:font-size="17pt" fo:font-weight="normal"/>
    </style:style>
    <style:style style:name="P24" style:family="paragraph">
      <style:paragraph-properties fo:text-align="start"/>
      <style:text-properties fo:color="#2b5f7a" loext:opacity="100%" style:font-name="Open Sans" fo:font-size="13pt" fo:font-weight="bold"/>
    </style:style>
    <style:style style:name="P25" style:family="paragraph">
      <loext:graphic-properties draw:fill="none" draw:fill-color="#ffffff"/>
      <style:paragraph-properties fo:text-align="start"/>
      <style:text-properties fo:color="#2b5f7a" loext:opacity="100%" style:font-name="Open Sans" fo:font-size="13pt" fo:font-weight="bold"/>
    </style:style>
    <style:style style:name="P26" style:family="paragraph">
      <style:paragraph-properties fo:text-align="start"/>
      <style:text-properties fo:color="#243746" loext:opacity="100%" style:font-name="Open Sans" fo:font-size="13pt" fo:font-weight="bold"/>
    </style:style>
    <style:style style:name="P27" style:family="paragraph">
      <loext:graphic-properties draw:fill="none" draw:fill-color="#ffffff"/>
      <style:paragraph-properties fo:text-align="start"/>
      <style:text-properties fo:color="#243746" loext:opacity="100%" style:font-name="Open Sans" fo:font-size="13pt" fo:font-weight="bold"/>
    </style:style>
    <style:style style:name="P28" style:family="paragraph">
      <loext:graphic-properties draw:fill-color="#856a34"/>
      <style:paragraph-properties fo:text-align="center"/>
    </style:style>
    <style:style style:name="P29" style:family="paragraph">
      <style:paragraph-properties fo:text-align="start"/>
      <style:text-properties fo:color="#68747d" loext:opacity="100%" style:font-name="Open Sans" fo:font-size="14pt" fo:font-weight="bold"/>
    </style:style>
    <style:style style:name="P30" style:family="paragraph">
      <loext:graphic-properties draw:fill="none" draw:fill-color="#ffffff"/>
      <style:paragraph-properties fo:text-align="start"/>
      <style:text-properties fo:color="#68747d" loext:opacity="100%" style:font-name="Open Sans" fo:font-size="14pt" fo:font-weight="bold"/>
    </style:style>
    <style:style style:name="P31" style:family="paragraph">
      <loext:graphic-properties draw:fill-color="#ffffff"/>
    </style:style>
    <style:style style:name="P32" style:family="paragraph">
      <style:paragraph-properties fo:text-align="start"/>
      <style:text-properties fo:color="#243746" loext:opacity="100%" style:font-name="Open Sans" fo:font-size="29pt" fo:font-weight="bold"/>
    </style:style>
    <style:style style:name="P33" style:family="paragraph">
      <loext:graphic-properties draw:fill="none" draw:fill-color="#ffffff"/>
      <style:paragraph-properties fo:text-align="start"/>
      <style:text-properties fo:color="#243746" loext:opacity="100%" style:font-name="Open Sans" fo:font-size="29pt" fo:font-weight="bold"/>
    </style:style>
    <style:style style:name="P34" style:family="paragraph">
      <style:paragraph-properties fo:text-align="start"/>
      <style:text-properties fo:color="#68747d" loext:opacity="100%" style:font-name="Open Sans" fo:font-size="16pt" fo:font-weight="normal"/>
    </style:style>
    <style:style style:name="P35" style:family="paragraph">
      <loext:graphic-properties draw:fill="none" draw:fill-color="#ffffff"/>
      <style:paragraph-properties fo:text-align="start"/>
      <style:text-properties fo:color="#68747d" loext:opacity="100%" style:font-name="Open Sans" fo:font-size="16pt" fo:font-weight="normal"/>
    </style:style>
    <style:style style:name="P36" style:family="paragraph">
      <style:paragraph-properties fo:text-align="start"/>
      <style:text-properties fo:color="#2b5f7a" loext:opacity="100%" style:font-name="Open Sans" fo:font-size="16pt" fo:font-weight="bold"/>
    </style:style>
    <style:style style:name="P37" style:family="paragraph">
      <loext:graphic-properties draw:fill="none" draw:fill-color="#ffffff"/>
      <style:paragraph-properties fo:text-align="start"/>
      <style:text-properties fo:color="#2b5f7a" loext:opacity="100%" style:font-name="Open Sans" fo:font-size="16pt" fo:font-weight="bold"/>
    </style:style>
    <style:style style:name="P38" style:family="paragraph">
      <style:paragraph-properties fo:text-align="start"/>
      <style:text-properties fo:color="#243746" loext:opacity="100%" style:font-name="Open Sans" fo:font-size="21pt" fo:font-weight="bold"/>
    </style:style>
    <style:style style:name="P39" style:family="paragraph">
      <loext:graphic-properties draw:fill="none" draw:fill-color="#ffffff"/>
      <style:paragraph-properties fo:text-align="start"/>
      <style:text-properties fo:color="#243746" loext:opacity="100%" style:font-name="Open Sans" fo:font-size="21pt" fo:font-weight="bold"/>
    </style:style>
    <style:style style:name="P40" style:family="paragraph">
      <style:paragraph-properties fo:text-align="center"/>
    </style:style>
    <style:style style:name="P41" style:family="paragraph">
      <style:paragraph-properties fo:text-align="start"/>
      <style:text-properties fo:color="#856a34" loext:opacity="100%" style:font-name="Open Sans" fo:font-size="16pt" fo:font-weight="bold"/>
    </style:style>
    <style:style style:name="P42" style:family="paragraph">
      <loext:graphic-properties draw:fill="none" draw:fill-color="#ffffff"/>
      <style:paragraph-properties fo:text-align="start"/>
      <style:text-properties fo:color="#856a34" loext:opacity="100%" style:font-name="Open Sans" fo:font-size="16pt" fo:font-weight="bold"/>
    </style:style>
    <style:style style:name="P43" style:family="paragraph">
      <style:paragraph-properties fo:text-align="start"/>
      <style:text-properties fo:color="#4f7392" loext:opacity="100%" style:font-name="Open Sans" fo:font-size="16pt" fo:font-weight="bold"/>
    </style:style>
    <style:style style:name="P44" style:family="paragraph">
      <loext:graphic-properties draw:fill="none" draw:fill-color="#ffffff"/>
      <style:paragraph-properties fo:text-align="start"/>
      <style:text-properties fo:color="#4f7392" loext:opacity="100%" style:font-name="Open Sans" fo:font-size="16pt" fo:font-weight="bold"/>
    </style:style>
    <style:style style:name="P45" style:family="paragraph">
      <style:paragraph-properties fo:text-align="start"/>
      <style:text-properties fo:color="#47705d" loext:opacity="100%" style:font-name="Open Sans" fo:font-size="16pt" fo:font-weight="bold"/>
    </style:style>
    <style:style style:name="P46" style:family="paragraph">
      <loext:graphic-properties draw:fill="none" draw:fill-color="#ffffff"/>
      <style:paragraph-properties fo:text-align="start"/>
      <style:text-properties fo:color="#47705d" loext:opacity="100%" style:font-name="Open Sans" fo:font-size="16pt" fo:font-weight="bold"/>
    </style:style>
    <style:style style:name="P47" style:family="paragraph">
      <loext:graphic-properties draw:fill-color="#47705d"/>
      <style:paragraph-properties fo:text-align="center"/>
    </style:style>
    <style:style style:name="P48" style:family="paragraph">
      <style:paragraph-properties fo:text-align="start"/>
      <style:text-properties fo:color="#47705d" loext:opacity="100%" style:font-name="Open Sans" fo:font-size="22pt" fo:font-weight="bold"/>
    </style:style>
    <style:style style:name="P49" style:family="paragraph">
      <loext:graphic-properties draw:fill="none" draw:fill-color="#ffffff"/>
      <style:paragraph-properties fo:text-align="start"/>
      <style:text-properties fo:color="#47705d" loext:opacity="100%" style:font-name="Open Sans" fo:font-size="22pt" fo:font-weight="bold"/>
    </style:style>
    <style:style style:name="P50" style:family="paragraph">
      <style:paragraph-properties fo:text-align="start"/>
      <style:text-properties fo:color="#243746" loext:opacity="100%" style:font-name="Open Sans" fo:font-size="22pt" fo:font-weight="normal"/>
    </style:style>
    <style:style style:name="P51" style:family="paragraph">
      <loext:graphic-properties draw:fill="none" draw:fill-color="#ffffff"/>
      <style:paragraph-properties fo:text-align="start"/>
      <style:text-properties fo:color="#243746" loext:opacity="100%" style:font-name="Open Sans" fo:font-size="22pt" fo:font-weight="normal"/>
    </style:style>
    <style:style style:name="P52" style:family="paragraph">
      <style:paragraph-properties fo:text-align="start"/>
      <style:text-properties fo:color="#856a34" loext:opacity="100%" style:font-name="Open Sans" fo:font-size="22pt" fo:font-weight="bold"/>
    </style:style>
    <style:style style:name="P53" style:family="paragraph">
      <loext:graphic-properties draw:fill="none" draw:fill-color="#ffffff"/>
      <style:paragraph-properties fo:text-align="start"/>
      <style:text-properties fo:color="#856a34" loext:opacity="100%" style:font-name="Open Sans" fo:font-size="22pt" fo:font-weight="bold"/>
    </style:style>
    <style:style style:name="P54" style:family="paragraph">
      <style:paragraph-properties fo:text-align="start"/>
      <style:text-properties fo:color="#2b5f7a" loext:opacity="100%" style:font-name="Open Sans" fo:font-size="22pt" fo:font-weight="bold"/>
    </style:style>
    <style:style style:name="P55" style:family="paragraph">
      <loext:graphic-properties draw:fill="none" draw:fill-color="#ffffff"/>
      <style:paragraph-properties fo:text-align="start"/>
      <style:text-properties fo:color="#2b5f7a" loext:opacity="100%" style:font-name="Open Sans" fo:font-size="22pt" fo:font-weight="bold"/>
    </style:style>
    <style:style style:name="P56" style:family="paragraph">
      <style:paragraph-properties fo:text-align="start"/>
      <style:text-properties fo:color="#243746" loext:opacity="100%" style:font-name="Open Sans" fo:font-size="16pt" fo:font-weight="normal"/>
    </style:style>
    <style:style style:name="P57" style:family="paragraph">
      <loext:graphic-properties draw:fill="none" draw:fill-color="#ffffff"/>
      <style:paragraph-properties fo:text-align="start"/>
      <style:text-properties fo:color="#243746" loext:opacity="100%" style:font-name="Open Sans" fo:font-size="16pt" fo:font-weight="normal"/>
    </style:style>
    <style:style style:name="P58" style:family="paragraph">
      <loext:graphic-properties draw:fill-color="#4f7392"/>
      <style:paragraph-properties fo:text-align="center"/>
    </style:style>
    <style:style style:name="P59" style:family="paragraph">
      <style:paragraph-properties fo:text-align="start"/>
      <style:text-properties fo:color="#4f7392" loext:opacity="100%" style:font-name="Open Sans" fo:font-size="22pt" fo:font-weight="bold"/>
    </style:style>
    <style:style style:name="P60" style:family="paragraph">
      <loext:graphic-properties draw:fill="none" draw:fill-color="#ffffff"/>
      <style:paragraph-properties fo:text-align="start"/>
      <style:text-properties fo:color="#4f7392" loext:opacity="100%" style:font-name="Open Sans" fo:font-size="22pt" fo:font-weight="bold"/>
    </style:style>
    <style:style style:name="P61" style:family="paragraph">
      <loext:graphic-properties draw:fill-color="#8c4e4e"/>
      <style:paragraph-properties fo:text-align="center"/>
    </style:style>
    <style:style style:name="P62" style:family="paragraph">
      <style:paragraph-properties fo:text-align="start"/>
      <style:text-properties fo:color="#8c4e4e" loext:opacity="100%" style:font-name="Open Sans" fo:font-size="22pt" fo:font-weight="bold"/>
    </style:style>
    <style:style style:name="P63" style:family="paragraph">
      <loext:graphic-properties draw:fill="none" draw:fill-color="#ffffff"/>
      <style:paragraph-properties fo:text-align="start"/>
      <style:text-properties fo:color="#8c4e4e" loext:opacity="100%" style:font-name="Open Sans" fo:font-size="22pt" fo:font-weight="bold"/>
    </style:style>
    <style:style style:name="P64" style:family="paragraph">
      <loext:graphic-properties draw:fill-color="#e5eaee"/>
      <style:paragraph-properties fo:text-align="center"/>
    </style:style>
    <style:style style:name="P65" style:family="paragraph">
      <style:paragraph-properties fo:text-align="start"/>
      <style:text-properties fo:color="#68747d" loext:opacity="100%" style:font-name="Open Sans" fo:font-size="16pt" fo:font-weight="bold"/>
    </style:style>
    <style:style style:name="P66" style:family="paragraph">
      <loext:graphic-properties draw:fill="none" draw:fill-color="#ffffff"/>
      <style:paragraph-properties fo:text-align="start"/>
      <style:text-properties fo:color="#68747d" loext:opacity="100%" style:font-name="Open Sans" fo:font-size="16pt" fo:font-weight="bold"/>
    </style:style>
    <style:style style:name="P67" style:family="paragraph">
      <style:paragraph-properties fo:text-align="center"/>
      <style:text-properties fo:color="#243746" loext:opacity="100%" style:font-name="Open Sans" fo:font-size="25pt" fo:font-weight="bold"/>
    </style:style>
    <style:style style:name="P68" style:family="paragraph">
      <loext:graphic-properties draw:fill="none" draw:fill-color="#ffffff"/>
      <style:paragraph-properties fo:text-align="center"/>
      <style:text-properties fo:color="#243746" loext:opacity="100%" style:font-name="Open Sans" fo:font-size="25pt" fo:font-weight="bold"/>
    </style:style>
    <style:style style:name="P69" style:family="paragraph">
      <style:paragraph-properties fo:text-align="center"/>
      <style:text-properties fo:color="#243746" loext:opacity="100%" style:font-name="Open Sans" fo:font-size="17pt" fo:font-weight="normal"/>
    </style:style>
    <style:style style:name="P70" style:family="paragraph">
      <loext:graphic-properties draw:fill="none" draw:fill-color="#ffffff"/>
      <style:paragraph-properties fo:text-align="center"/>
      <style:text-properties fo:color="#243746" loext:opacity="100%" style:font-name="Open Sans" fo:font-size="17pt" fo:font-weight="normal"/>
    </style:style>
    <style:style style:name="P71" style:family="paragraph">
      <style:paragraph-properties fo:text-align="center"/>
      <style:text-properties fo:color="#4f7392" loext:opacity="100%" style:font-name="Open Sans" fo:font-size="34pt" fo:font-weight="bold"/>
    </style:style>
    <style:style style:name="P72" style:family="paragraph">
      <loext:graphic-properties draw:fill="none" draw:fill-color="#ffffff"/>
      <style:paragraph-properties fo:text-align="center"/>
      <style:text-properties fo:color="#4f7392" loext:opacity="100%" style:font-name="Open Sans" fo:font-size="34pt" fo:font-weight="bold"/>
    </style:style>
    <style:style style:name="P73" style:family="paragraph">
      <style:paragraph-properties fo:text-align="center"/>
      <style:text-properties fo:color="#856a34" loext:opacity="100%" style:font-name="Open Sans" fo:font-size="34pt" fo:font-weight="bold"/>
    </style:style>
    <style:style style:name="P74" style:family="paragraph">
      <loext:graphic-properties draw:fill="none" draw:fill-color="#ffffff"/>
      <style:paragraph-properties fo:text-align="center"/>
      <style:text-properties fo:color="#856a34" loext:opacity="100%" style:font-name="Open Sans" fo:font-size="34pt" fo:font-weight="bold"/>
    </style:style>
    <style:style style:name="P75" style:family="paragraph">
      <style:paragraph-properties fo:text-align="center"/>
      <style:text-properties fo:color="#47705d" loext:opacity="100%" style:font-name="Open Sans" fo:font-size="34pt" fo:font-weight="bold"/>
    </style:style>
    <style:style style:name="P76" style:family="paragraph">
      <loext:graphic-properties draw:fill="none" draw:fill-color="#ffffff"/>
      <style:paragraph-properties fo:text-align="center"/>
      <style:text-properties fo:color="#47705d" loext:opacity="100%" style:font-name="Open Sans" fo:font-size="34pt" fo:font-weight="bold"/>
    </style:style>
    <style:style style:name="P77" style:family="paragraph">
      <style:paragraph-properties fo:text-align="start"/>
      <style:text-properties fo:color="#243746" loext:opacity="100%" style:font-name="Open Sans" fo:font-size="21pt" fo:font-weight="normal"/>
    </style:style>
    <style:style style:name="P78" style:family="paragraph">
      <loext:graphic-properties draw:fill="none" draw:fill-color="#ffffff"/>
      <style:paragraph-properties fo:text-align="start"/>
      <style:text-properties fo:color="#243746" loext:opacity="100%" style:font-name="Open Sans" fo:font-size="21pt" fo:font-weight="normal"/>
    </style:style>
    <style:style style:name="P79" style:family="paragraph">
      <style:paragraph-properties fo:text-align="start"/>
      <style:text-properties fo:color="#243746" loext:opacity="100%" style:font-name="Open Sans" fo:font-size="19pt" fo:font-weight="normal"/>
    </style:style>
    <style:style style:name="P80" style:family="paragraph">
      <loext:graphic-properties draw:fill="none" draw:fill-color="#ffffff"/>
      <style:paragraph-properties fo:text-align="start"/>
      <style:text-properties fo:color="#243746" loext:opacity="100%" style:font-name="Open Sans" fo:font-size="19pt" fo:font-weight="normal"/>
    </style:style>
    <style:style style:name="P81" style:family="paragraph">
      <style:paragraph-properties fo:text-align="start"/>
      <style:text-properties fo:color="#2b5f7a" loext:opacity="100%" style:font-name="Open Sans" fo:font-size="20pt" fo:font-weight="bold"/>
    </style:style>
    <style:style style:name="P82" style:family="paragraph">
      <loext:graphic-properties draw:fill="none" draw:fill-color="#ffffff"/>
      <style:paragraph-properties fo:text-align="start"/>
      <style:text-properties fo:color="#2b5f7a" loext:opacity="100%" style:font-name="Open Sans" fo:font-size="20pt" fo:font-weight="bold"/>
    </style:style>
    <style:style style:name="P83" style:family="paragraph">
      <style:paragraph-properties fo:text-align="center"/>
      <style:text-properties fo:color="#243746" loext:opacity="100%" style:font-name="Open Sans" fo:font-size="24pt" fo:font-weight="bold"/>
    </style:style>
    <style:style style:name="P84" style:family="paragraph">
      <loext:graphic-properties draw:fill="none" draw:fill-color="#ffffff"/>
      <style:paragraph-properties fo:text-align="center"/>
      <style:text-properties fo:color="#243746" loext:opacity="100%" style:font-name="Open Sans" fo:font-size="24pt" fo:font-weight="bold"/>
    </style:style>
    <style:style style:name="P85" style:family="paragraph">
      <style:paragraph-properties fo:text-align="center"/>
      <style:text-properties fo:color="#68747d" loext:opacity="100%" style:font-name="Open Sans" fo:font-size="16pt" fo:font-weight="normal"/>
    </style:style>
    <style:style style:name="P86" style:family="paragraph">
      <loext:graphic-properties draw:fill="none" draw:fill-color="#ffffff"/>
      <style:paragraph-properties fo:text-align="center"/>
      <style:text-properties fo:color="#68747d" loext:opacity="100%" style:font-name="Open Sans" fo:font-size="16pt" fo:font-weight="normal"/>
    </style:style>
    <style:style style:name="P87" style:family="paragraph">
      <style:paragraph-properties fo:text-align="start"/>
      <style:text-properties fo:color="#856a34" loext:opacity="100%" style:font-name="Open Sans" fo:font-size="20pt" fo:font-weight="bold"/>
    </style:style>
    <style:style style:name="P88" style:family="paragraph">
      <loext:graphic-properties draw:fill="none" draw:fill-color="#ffffff"/>
      <style:paragraph-properties fo:text-align="start"/>
      <style:text-properties fo:color="#856a34" loext:opacity="100%" style:font-name="Open Sans" fo:font-size="20pt" fo:font-weight="bold"/>
    </style:style>
    <style:style style:name="P89" style:family="paragraph">
      <style:paragraph-properties fo:text-align="start"/>
      <style:text-properties fo:color="#4f7392" loext:opacity="100%" style:font-name="Open Sans" fo:font-size="20pt" fo:font-weight="bold"/>
    </style:style>
    <style:style style:name="P90" style:family="paragraph">
      <loext:graphic-properties draw:fill="none" draw:fill-color="#ffffff"/>
      <style:paragraph-properties fo:text-align="start"/>
      <style:text-properties fo:color="#4f7392" loext:opacity="100%" style:font-name="Open Sans" fo:font-size="20pt" fo:font-weight="bold"/>
    </style:style>
    <style:style style:name="P91" style:family="paragraph">
      <style:paragraph-properties fo:text-align="center"/>
      <style:text-properties fo:color="#856a34" loext:opacity="100%" style:font-name="Open Sans" fo:font-size="13pt" fo:font-weight="bold"/>
    </style:style>
    <style:style style:name="P92" style:family="paragraph">
      <loext:graphic-properties draw:fill="none" draw:fill-color="#ffffff"/>
      <style:paragraph-properties fo:text-align="center"/>
      <style:text-properties fo:color="#856a34" loext:opacity="100%" style:font-name="Open Sans" fo:font-size="13pt" fo:font-weight="bold"/>
    </style:style>
    <style:style style:name="P93" style:family="paragraph">
      <style:paragraph-properties fo:text-align="start"/>
      <style:text-properties fo:color="#856a34" loext:opacity="100%" style:font-name="Open Sans" fo:font-size="17pt" fo:font-weight="bold"/>
    </style:style>
    <style:style style:name="P94" style:family="paragraph">
      <loext:graphic-properties draw:fill="none" draw:fill-color="#ffffff"/>
      <style:paragraph-properties fo:text-align="start"/>
      <style:text-properties fo:color="#856a34" loext:opacity="100%" style:font-name="Open Sans" fo:font-size="17pt" fo:font-weight="bold"/>
    </style:style>
    <style:style style:name="P95" style:family="paragraph">
      <style:paragraph-properties fo:text-align="center"/>
      <style:text-properties fo:color="#243746" loext:opacity="100%" style:font-name="Open Sans" fo:font-size="21pt" fo:font-weight="bold"/>
    </style:style>
    <style:style style:name="P96" style:family="paragraph">
      <loext:graphic-properties draw:fill="none" draw:fill-color="#ffffff"/>
      <style:paragraph-properties fo:text-align="center"/>
      <style:text-properties fo:color="#243746" loext:opacity="100%" style:font-name="Open Sans" fo:font-size="21pt" fo:font-weight="bold"/>
    </style:style>
    <style:style style:name="P97" style:family="paragraph">
      <style:paragraph-properties fo:text-align="start"/>
      <style:text-properties fo:color="#243746" loext:opacity="100%" style:font-name="Open Sans" fo:font-size="20pt" fo:font-weight="normal"/>
    </style:style>
    <style:style style:name="P98" style:family="paragraph">
      <loext:graphic-properties draw:fill="none" draw:fill-color="#ffffff"/>
      <style:paragraph-properties fo:text-align="start"/>
      <style:text-properties fo:color="#243746" loext:opacity="100%" style:font-name="Open Sans" fo:font-size="20pt" fo:font-weight="normal"/>
    </style:style>
    <style:style style:name="P99" style:family="paragraph">
      <style:paragraph-properties fo:text-align="center"/>
      <style:text-properties fo:color="#243746" loext:opacity="100%" style:font-name="Open Sans" fo:font-size="30pt" fo:font-weight="bold"/>
    </style:style>
    <style:style style:name="P100" style:family="paragraph">
      <loext:graphic-properties draw:fill="none" draw:fill-color="#ffffff"/>
      <style:paragraph-properties fo:text-align="center"/>
      <style:text-properties fo:color="#243746" loext:opacity="100%" style:font-name="Open Sans" fo:font-size="30pt" fo:font-weight="bold"/>
    </style:style>
    <style:style style:name="P101" style:family="paragraph">
      <style:paragraph-properties fo:text-align="center"/>
      <style:text-properties fo:color="#2b5f7a" loext:opacity="100%" style:font-name="Open Sans" fo:font-size="20pt" fo:font-weight="bold"/>
    </style:style>
    <style:style style:name="P102" style:family="paragraph">
      <loext:graphic-properties draw:fill="none" draw:fill-color="#ffffff"/>
      <style:paragraph-properties fo:text-align="center"/>
      <style:text-properties fo:color="#2b5f7a" loext:opacity="100%" style:font-name="Open Sans" fo:font-size="20pt" fo:font-weight="bold"/>
    </style:style>
    <style:style style:name="P103" style:family="paragraph">
      <style:paragraph-properties fo:text-align="center"/>
      <style:text-properties fo:color="#68747d" loext:opacity="100%" style:font-name="Open Sans" fo:font-size="15pt" fo:font-weight="normal"/>
    </style:style>
    <style:style style:name="P104" style:family="paragraph">
      <loext:graphic-properties draw:fill="none" draw:fill-color="#ffffff"/>
      <style:paragraph-properties fo:text-align="center"/>
      <style:text-properties fo:color="#68747d" loext:opacity="100%" style:font-name="Open Sans" fo:font-size="15pt" fo:font-weight="normal"/>
    </style:style>
    <style:style style:name="P105" style:family="paragraph">
      <style:paragraph-properties fo:text-align="center"/>
      <style:text-properties fo:color="#856a34" loext:opacity="100%" style:font-name="Open Sans" fo:font-size="20pt" fo:font-weight="bold"/>
    </style:style>
    <style:style style:name="P106" style:family="paragraph">
      <loext:graphic-properties draw:fill="none" draw:fill-color="#ffffff"/>
      <style:paragraph-properties fo:text-align="center"/>
      <style:text-properties fo:color="#856a34" loext:opacity="100%" style:font-name="Open Sans" fo:font-size="20pt" fo:font-weight="bold"/>
    </style:style>
    <style:style style:name="P107" style:family="paragraph">
      <style:paragraph-properties fo:text-align="center"/>
      <style:text-properties fo:color="#4f7392" loext:opacity="100%" style:font-name="Open Sans" fo:font-size="20pt" fo:font-weight="bold"/>
    </style:style>
    <style:style style:name="P108" style:family="paragraph">
      <loext:graphic-properties draw:fill="none" draw:fill-color="#ffffff"/>
      <style:paragraph-properties fo:text-align="center"/>
      <style:text-properties fo:color="#4f7392" loext:opacity="100%" style:font-name="Open Sans" fo:font-size="20pt" fo:font-weight="bold"/>
    </style:style>
    <style:style style:name="P109" style:family="paragraph">
      <style:paragraph-properties fo:text-align="center"/>
      <style:text-properties fo:color="#2b5f7a" loext:opacity="100%" style:font-name="Open Sans" fo:font-size="16pt" fo:font-weight="bold"/>
    </style:style>
    <style:style style:name="P110" style:family="paragraph">
      <loext:graphic-properties draw:fill="none" draw:fill-color="#ffffff"/>
      <style:paragraph-properties fo:text-align="center"/>
      <style:text-properties fo:color="#2b5f7a" loext:opacity="100%" style:font-name="Open Sans" fo:font-size="16pt" fo:font-weight="bold"/>
    </style:style>
    <style:style style:name="P111" style:family="paragraph">
      <style:paragraph-properties fo:text-align="center"/>
      <style:text-properties fo:color="#47705d" loext:opacity="100%" style:font-name="Open Sans" fo:font-size="20pt" fo:font-weight="bold"/>
    </style:style>
    <style:style style:name="P112" style:family="paragraph">
      <loext:graphic-properties draw:fill="none" draw:fill-color="#ffffff"/>
      <style:paragraph-properties fo:text-align="center"/>
      <style:text-properties fo:color="#47705d" loext:opacity="100%" style:font-name="Open Sans" fo:font-size="20pt" fo:font-weight="bold"/>
    </style:style>
    <style:style style:name="P113" style:family="paragraph">
      <style:paragraph-properties fo:text-align="center"/>
      <style:text-properties fo:color="#2b5f7a" loext:opacity="100%" style:font-name="Open Sans" fo:font-size="26pt" fo:font-weight="bold"/>
    </style:style>
    <style:style style:name="P114" style:family="paragraph">
      <loext:graphic-properties draw:fill="none" draw:fill-color="#ffffff"/>
      <style:paragraph-properties fo:text-align="center"/>
      <style:text-properties fo:color="#2b5f7a" loext:opacity="100%" style:font-name="Open Sans" fo:font-size="26pt" fo:font-weight="bold"/>
    </style:style>
    <style:style style:name="P115" style:family="paragraph">
      <style:paragraph-properties fo:text-align="center"/>
      <style:text-properties fo:color="#68747d" loext:opacity="100%" style:font-name="Open Sans" fo:font-size="13pt" fo:font-weight="normal"/>
    </style:style>
    <style:style style:name="P116" style:family="paragraph">
      <loext:graphic-properties draw:fill="none" draw:fill-color="#ffffff"/>
      <style:paragraph-properties fo:text-align="center"/>
      <style:text-properties fo:color="#68747d" loext:opacity="100%" style:font-name="Open Sans" fo:font-size="13pt" fo:font-weight="normal"/>
    </style:style>
    <style:style style:name="P117" style:family="paragraph">
      <style:paragraph-properties fo:text-align="center"/>
      <style:text-properties fo:color="#856a34" loext:opacity="100%" style:font-name="Open Sans" fo:font-size="26pt" fo:font-weight="bold"/>
    </style:style>
    <style:style style:name="P118" style:family="paragraph">
      <loext:graphic-properties draw:fill="none" draw:fill-color="#ffffff"/>
      <style:paragraph-properties fo:text-align="center"/>
      <style:text-properties fo:color="#856a34" loext:opacity="100%" style:font-name="Open Sans" fo:font-size="26pt" fo:font-weight="bold"/>
    </style:style>
    <style:style style:name="P119" style:family="paragraph">
      <style:paragraph-properties fo:text-align="center"/>
      <style:text-properties fo:color="#4f7392" loext:opacity="100%" style:font-name="Open Sans" fo:font-size="26pt" fo:font-weight="bold"/>
    </style:style>
    <style:style style:name="P120" style:family="paragraph">
      <loext:graphic-properties draw:fill="none" draw:fill-color="#ffffff"/>
      <style:paragraph-properties fo:text-align="center"/>
      <style:text-properties fo:color="#4f7392" loext:opacity="100%" style:font-name="Open Sans" fo:font-size="26pt" fo:font-weight="bold"/>
    </style:style>
    <style:style style:name="P121" style:family="paragraph">
      <style:paragraph-properties fo:text-align="center"/>
      <style:text-properties fo:color="#47705d" loext:opacity="100%" style:font-name="Open Sans" fo:font-size="26pt" fo:font-weight="bold"/>
    </style:style>
    <style:style style:name="P122" style:family="paragraph">
      <loext:graphic-properties draw:fill="none" draw:fill-color="#ffffff"/>
      <style:paragraph-properties fo:text-align="center"/>
      <style:text-properties fo:color="#47705d" loext:opacity="100%" style:font-name="Open Sans" fo:font-size="26pt" fo:font-weight="bold"/>
    </style:style>
    <style:style style:name="P123" style:family="paragraph">
      <style:paragraph-properties fo:text-align="start"/>
      <style:text-properties fo:color="#4f7392" loext:opacity="100%" style:font-name="Open Sans" fo:font-size="18pt" fo:font-weight="bold"/>
    </style:style>
    <style:style style:name="P124" style:family="paragraph">
      <loext:graphic-properties draw:fill="none" draw:fill-color="#ffffff"/>
      <style:paragraph-properties fo:text-align="start"/>
      <style:text-properties fo:color="#4f7392" loext:opacity="100%" style:font-name="Open Sans" fo:font-size="18pt" fo:font-weight="bold"/>
    </style:style>
    <style:style style:name="P125" style:family="paragraph">
      <style:paragraph-properties fo:text-align="center"/>
      <style:text-properties fo:color="#47705d" loext:opacity="100%" style:font-name="Open Sans" fo:font-size="14pt" fo:font-weight="bold"/>
    </style:style>
    <style:style style:name="P126" style:family="paragraph">
      <loext:graphic-properties draw:fill="none" draw:fill-color="#ffffff"/>
      <style:paragraph-properties fo:text-align="center"/>
      <style:text-properties fo:color="#47705d" loext:opacity="100%" style:font-name="Open Sans" fo:font-size="14pt" fo:font-weight="bold"/>
    </style:style>
    <style:style style:name="P127" style:family="paragraph">
      <style:paragraph-properties fo:text-align="start"/>
      <style:text-properties fo:color="#243746" loext:opacity="100%" style:font-name="Open Sans" fo:font-size="17pt" fo:font-weight="normal"/>
    </style:style>
    <style:style style:name="P128" style:family="paragraph">
      <loext:graphic-properties draw:fill="none" draw:fill-color="#ffffff"/>
      <style:paragraph-properties fo:text-align="start"/>
      <style:text-properties fo:color="#243746" loext:opacity="100%" style:font-name="Open Sans" fo:font-size="17pt" fo:font-weight="normal"/>
    </style:style>
    <style:style style:name="P129" style:family="paragraph">
      <style:paragraph-properties fo:text-align="center"/>
      <style:text-properties fo:color="#4f7392" loext:opacity="100%" style:font-name="Open Sans" fo:font-size="13pt" fo:font-weight="bold"/>
    </style:style>
    <style:style style:name="P130" style:family="paragraph">
      <loext:graphic-properties draw:fill="none" draw:fill-color="#ffffff"/>
      <style:paragraph-properties fo:text-align="center"/>
      <style:text-properties fo:color="#4f7392" loext:opacity="100%" style:font-name="Open Sans" fo:font-size="13pt" fo:font-weight="bold"/>
    </style:style>
    <style:style style:name="P131" style:family="paragraph">
      <loext:graphic-properties draw:fill-color="#29485c"/>
      <style:paragraph-properties fo:text-align="center"/>
    </style:style>
    <style:style style:name="P132" style:family="paragraph">
      <style:paragraph-properties fo:text-align="center"/>
      <style:text-properties fo:color="#ffffff" loext:opacity="100%" style:font-name="Open Sans" fo:font-size="15pt" fo:font-weight="bold"/>
    </style:style>
    <style:style style:name="P133" style:family="paragraph">
      <loext:graphic-properties draw:fill="none" draw:fill-color="#ffffff"/>
      <style:paragraph-properties fo:text-align="center"/>
      <style:text-properties fo:color="#ffffff" loext:opacity="100%" style:font-name="Open Sans" fo:font-size="15pt" fo:font-weight="bold"/>
    </style:style>
    <style:style style:name="P134" style:family="paragraph">
      <style:paragraph-properties fo:text-align="start"/>
      <style:text-properties fo:color="#243746" loext:opacity="100%" style:font-name="Open Sans" fo:font-size="15pt" fo:font-weight="bold"/>
    </style:style>
    <style:style style:name="P135" style:family="paragraph">
      <loext:graphic-properties draw:fill="none" draw:fill-color="#ffffff"/>
      <style:paragraph-properties fo:text-align="start"/>
      <style:text-properties fo:color="#243746" loext:opacity="100%" style:font-name="Open Sans" fo:font-size="15pt" fo:font-weight="bold"/>
    </style:style>
    <style:style style:name="P136" style:family="paragraph">
      <style:paragraph-properties fo:text-align="center"/>
      <style:text-properties fo:color="#243746" loext:opacity="100%" style:font-name="Open Sans" fo:font-size="15pt" fo:font-weight="normal"/>
    </style:style>
    <style:style style:name="P137" style:family="paragraph">
      <loext:graphic-properties draw:fill="none" draw:fill-color="#ffffff"/>
      <style:paragraph-properties fo:text-align="center"/>
      <style:text-properties fo:color="#243746" loext:opacity="100%" style:font-name="Open Sans" fo:font-size="15pt" fo:font-weight="normal"/>
    </style:style>
    <style:style style:name="P138" style:family="paragraph">
      <style:paragraph-properties fo:text-align="center"/>
      <style:text-properties fo:color="#243746" loext:opacity="100%" style:font-name="Open Sans" fo:font-size="15pt" fo:font-weight="bold"/>
    </style:style>
    <style:style style:name="P139" style:family="paragraph">
      <loext:graphic-properties draw:fill="none" draw:fill-color="#ffffff"/>
      <style:paragraph-properties fo:text-align="center"/>
      <style:text-properties fo:color="#243746" loext:opacity="100%" style:font-name="Open Sans" fo:font-size="15pt" fo:font-weight="bold"/>
    </style:style>
    <style:style style:name="P140" style:family="paragraph">
      <style:paragraph-properties fo:text-align="center"/>
      <style:text-properties fo:color="#47705d" loext:opacity="100%" style:font-name="Open Sans" fo:font-size="15pt" fo:font-weight="bold"/>
    </style:style>
    <style:style style:name="P141" style:family="paragraph">
      <loext:graphic-properties draw:fill="none" draw:fill-color="#ffffff"/>
      <style:paragraph-properties fo:text-align="center"/>
      <style:text-properties fo:color="#47705d" loext:opacity="100%" style:font-name="Open Sans" fo:font-size="15pt" fo:font-weight="bold"/>
    </style:style>
    <style:style style:name="P142" style:family="paragraph">
      <style:paragraph-properties fo:text-align="center"/>
      <style:text-properties fo:color="#68747d" loext:opacity="100%" style:font-name="Open Sans" fo:font-size="16pt" fo:font-weight="bold"/>
    </style:style>
    <style:style style:name="P143" style:family="paragraph">
      <loext:graphic-properties draw:fill="none" draw:fill-color="#ffffff"/>
      <style:paragraph-properties fo:text-align="center"/>
      <style:text-properties fo:color="#68747d" loext:opacity="100%" style:font-name="Open Sans" fo:font-size="16pt" fo:font-weight="bold"/>
    </style:style>
    <style:style style:name="P144" style:family="paragraph">
      <loext:graphic-properties draw:fill-color="#ffffff"/>
      <style:paragraph-properties fo:text-align="center"/>
    </style:style>
    <style:style style:name="P145" style:family="paragraph">
      <style:paragraph-properties fo:text-align="start"/>
      <style:text-properties fo:color="#243746" loext:opacity="100%" style:font-name="Open Sans" fo:font-size="14pt" fo:font-weight="normal"/>
    </style:style>
    <style:style style:name="P146" style:family="paragraph">
      <loext:graphic-properties draw:fill="none" draw:fill-color="#ffffff"/>
      <style:paragraph-properties fo:text-align="start"/>
      <style:text-properties fo:color="#243746" loext:opacity="100%" style:font-name="Open Sans" fo:font-size="14pt" fo:font-weight="normal"/>
    </style:style>
    <style:style style:name="P147" style:family="paragraph">
      <style:paragraph-properties fo:text-align="start"/>
      <style:text-properties fo:color="#243746" loext:opacity="100%" style:font-name="Open Sans" fo:font-size="13pt" fo:font-weight="normal"/>
    </style:style>
    <style:style style:name="P148" style:family="paragraph">
      <loext:graphic-properties draw:fill="none" draw:fill-color="#ffffff"/>
      <style:paragraph-properties fo:text-align="start"/>
      <style:text-properties fo:color="#243746" loext:opacity="100%" style:font-name="Open Sans" fo:font-size="13pt" fo:font-weight="normal"/>
    </style:style>
    <style:style style:name="P149" style:family="paragraph">
      <style:paragraph-properties fo:text-align="center"/>
      <style:text-properties fo:color="#243746" loext:opacity="100%" style:font-name="Open Sans" fo:font-size="17pt" fo:font-weight="bold"/>
    </style:style>
    <style:style style:name="P150" style:family="paragraph">
      <loext:graphic-properties draw:fill="none" draw:fill-color="#ffffff"/>
      <style:paragraph-properties fo:text-align="center"/>
      <style:text-properties fo:color="#243746" loext:opacity="100%" style:font-name="Open Sans" fo:font-size="17pt" fo:font-weight="bold"/>
    </style:style>
    <style:style style:name="P151" style:family="paragraph">
      <style:paragraph-properties fo:text-align="center"/>
      <style:text-properties fo:color="#47705d" loext:opacity="100%" style:font-name="Open Sans" fo:font-size="13pt" fo:font-weight="bold"/>
    </style:style>
    <style:style style:name="P152" style:family="paragraph">
      <loext:graphic-properties draw:fill="none" draw:fill-color="#ffffff"/>
      <style:paragraph-properties fo:text-align="center"/>
      <style:text-properties fo:color="#47705d" loext:opacity="100%" style:font-name="Open Sans" fo:font-size="13pt" fo:font-weight="bold"/>
    </style:style>
    <style:style style:name="P153" style:family="paragraph">
      <style:paragraph-properties fo:text-align="center"/>
      <style:text-properties fo:color="#243746" loext:opacity="100%" style:font-name="Open Sans" fo:font-size="22pt" fo:font-weight="bold"/>
    </style:style>
    <style:style style:name="P154" style:family="paragraph">
      <loext:graphic-properties draw:fill="none" draw:fill-color="#ffffff"/>
      <style:paragraph-properties fo:text-align="center"/>
      <style:text-properties fo:color="#243746" loext:opacity="100%" style:font-name="Open Sans" fo:font-size="22pt" fo:font-weight="bold"/>
    </style:style>
    <style:style style:name="P155" style:family="paragraph">
      <style:paragraph-properties fo:text-align="center"/>
      <style:text-properties fo:color="#243746" loext:opacity="100%" style:font-name="Open Sans" fo:font-size="18pt" fo:font-weight="bold"/>
    </style:style>
    <style:style style:name="P156" style:family="paragraph">
      <loext:graphic-properties draw:fill="none" draw:fill-color="#ffffff"/>
      <style:paragraph-properties fo:text-align="center"/>
      <style:text-properties fo:color="#243746" loext:opacity="100%" style:font-name="Open Sans" fo:font-size="18pt" fo:font-weight="bold"/>
    </style:style>
    <style:style style:name="P157" style:family="paragraph">
      <style:paragraph-properties fo:text-align="center"/>
      <style:text-properties fo:color="#243746" loext:opacity="100%" style:font-name="Open Sans" fo:font-size="19pt" fo:font-weight="bold"/>
    </style:style>
    <style:style style:name="P158" style:family="paragraph">
      <loext:graphic-properties draw:fill="none" draw:fill-color="#ffffff"/>
      <style:paragraph-properties fo:text-align="center"/>
      <style:text-properties fo:color="#243746" loext:opacity="100%" style:font-name="Open Sans" fo:font-size="19pt" fo:font-weight="bold"/>
    </style:style>
    <style:style style:name="P159" style:family="paragraph">
      <style:paragraph-properties fo:text-align="start"/>
      <style:text-properties fo:color="#2b5f7a" loext:opacity="100%" style:font-name="Open Sans" fo:font-size="17pt" fo:font-weight="bold"/>
    </style:style>
    <style:style style:name="P160" style:family="paragraph">
      <loext:graphic-properties draw:fill="none" draw:fill-color="#ffffff"/>
      <style:paragraph-properties fo:text-align="start"/>
      <style:text-properties fo:color="#2b5f7a" loext:opacity="100%" style:font-name="Open Sans" fo:font-size="17pt" fo:font-weight="bold"/>
    </style:style>
    <style:style style:name="P161" style:family="paragraph">
      <style:paragraph-properties fo:text-align="start"/>
      <style:text-properties fo:color="#243746" loext:opacity="100%" style:font-name="Open Sans" fo:font-size="20pt" fo:font-weight="bold"/>
    </style:style>
    <style:style style:name="P162" style:family="paragraph">
      <loext:graphic-properties draw:fill="none" draw:fill-color="#ffffff"/>
      <style:paragraph-properties fo:text-align="start"/>
      <style:text-properties fo:color="#243746" loext:opacity="100%" style:font-name="Open Sans" fo:font-size="20pt" fo:font-weight="bold"/>
    </style:style>
    <style:style style:name="P163" style:family="paragraph">
      <style:paragraph-properties fo:text-align="start"/>
      <style:text-properties fo:color="#4f7392" loext:opacity="100%" style:font-name="Open Sans" fo:font-size="17pt" fo:font-weight="bold"/>
    </style:style>
    <style:style style:name="P164" style:family="paragraph">
      <loext:graphic-properties draw:fill="none" draw:fill-color="#ffffff"/>
      <style:paragraph-properties fo:text-align="start"/>
      <style:text-properties fo:color="#4f7392" loext:opacity="100%" style:font-name="Open Sans" fo:font-size="17pt" fo:font-weight="bold"/>
    </style:style>
    <style:style style:name="P165" style:family="paragraph">
      <style:paragraph-properties fo:text-align="start"/>
      <style:text-properties fo:color="#47705d" loext:opacity="100%" style:font-name="Open Sans" fo:font-size="17pt" fo:font-weight="bold"/>
    </style:style>
    <style:style style:name="P166" style:family="paragraph">
      <loext:graphic-properties draw:fill="none" draw:fill-color="#ffffff"/>
      <style:paragraph-properties fo:text-align="start"/>
      <style:text-properties fo:color="#47705d" loext:opacity="100%" style:font-name="Open Sans" fo:font-size="17pt" fo:font-weight="bold"/>
    </style:style>
    <style:style style:name="P167" style:family="paragraph">
      <style:paragraph-properties fo:text-align="start"/>
      <style:text-properties fo:color="#8c4e4e" loext:opacity="100%" style:font-name="Open Sans" fo:font-size="17pt" fo:font-weight="bold"/>
    </style:style>
    <style:style style:name="P168" style:family="paragraph">
      <loext:graphic-properties draw:fill="none" draw:fill-color="#ffffff"/>
      <style:paragraph-properties fo:text-align="start"/>
      <style:text-properties fo:color="#8c4e4e" loext:opacity="100%" style:font-name="Open Sans" fo:font-size="17pt" fo:font-weight="bold"/>
    </style:style>
    <style:style style:name="P169" style:family="paragraph">
      <style:paragraph-properties fo:text-align="start"/>
      <style:text-properties fo:color="#ffffff" loext:opacity="100%" style:font-name="Open Sans" fo:font-size="27pt" fo:font-weight="bold"/>
    </style:style>
    <style:style style:name="P170" style:family="paragraph">
      <loext:graphic-properties draw:fill="none" draw:fill-color="#ffffff"/>
      <style:paragraph-properties fo:text-align="start"/>
      <style:text-properties fo:color="#ffffff" loext:opacity="100%" style:font-name="Open Sans" fo:font-size="27pt" fo:font-weight="bold"/>
    </style:style>
    <style:style style:name="P171" style:family="paragraph">
      <style:paragraph-properties fo:text-align="center"/>
      <style:text-properties fo:color="#ffffff" loext:opacity="100%" style:font-name="Open Sans" fo:font-size="19pt" fo:font-weight="bold"/>
    </style:style>
    <style:style style:name="P172" style:family="paragraph">
      <loext:graphic-properties draw:fill="none" draw:fill-color="#ffffff"/>
      <style:paragraph-properties fo:text-align="center"/>
      <style:text-properties fo:color="#ffffff" loext:opacity="100%" style:font-name="Open Sans" fo:font-size="19pt" fo:font-weight="bold"/>
    </style:style>
    <style:style style:name="P173" style:family="paragraph">
      <style:paragraph-properties fo:text-align="center"/>
      <style:text-properties fo:color="#47705d" loext:opacity="100%" style:font-name="Open Sans" fo:font-size="23pt" fo:font-weight="bold"/>
    </style:style>
    <style:style style:name="P174" style:family="paragraph">
      <loext:graphic-properties draw:fill="none" draw:fill-color="#ffffff"/>
      <style:paragraph-properties fo:text-align="center"/>
      <style:text-properties fo:color="#47705d" loext:opacity="100%" style:font-name="Open Sans" fo:font-size="23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33.867cm" svg:height="19.05cm" svg:x="0cm" svg:y="0cm">
          <text:p/>
        </draw:rect>
        <draw:rect draw:style-name="gr2" draw:text-style-name="P2" draw:layer="layout" svg:width="33.867cm" svg:height="0.17cm" svg:x="0cm" svg:y="0cm">
          <text:p/>
        </draw:rect>
        <draw:rect draw:style-name="gr3" draw:text-style-name="P3" draw:layer="layout" svg:width="33.867cm" svg:height="0.055cm" svg:x="0cm" svg:y="0.17cm">
          <text:p/>
        </draw:rect>
        <draw:frame draw:style-name="gr4" draw:text-style-name="P5" draw:layer="layout" svg:width="0.9cm" svg:height="0.717cm" svg:x="1.18cm" svg:y="18.16cm">
          <draw:text-box>
            <text:p text:style-name="P4">01</text:p>
          </draw:text-box>
        </draw:frame>
        <draw:frame draw:style-name="gr4" draw:text-style-name="P7" draw:layer="layout" svg:width="12cm" svg:height="0.717cm" svg:x="2.2cm" svg:y="18.16cm">
          <draw:text-box>
            <text:p text:style-name="P6">Juan Carlos Cruz Muñoz <text:s/>· <text:s/>0:00–0:25</text:p>
          </draw:text-box>
        </draw:frame>
        <draw:rect draw:style-name="gr5" draw:text-style-name="P8" draw:layer="layout" svg:width="5.6cm" svg:height="0.06cm" svg:x="26.9cm" svg:y="18.33cm">
          <text:p/>
        </draw:rect>
        <draw:rect draw:style-name="gr3" draw:text-style-name="P3" draw:layer="layout" svg:width="1.4cm" svg:height="0.06cm" svg:x="26.9cm" svg:y="18.33cm">
          <text:p/>
        </draw:rect>
        <draw:rect draw:style-name="gr6" draw:text-style-name="P1" draw:layer="layout" svg:width="14cm" svg:height="0.62cm" svg:x="1.32cm" svg:y="1.25cm" draw:corner-radius="0.04cm">
          <text:p/>
        </draw:rect>
        <draw:frame draw:style-name="gr7" draw:text-style-name="P10" draw:layer="layout" svg:width="13.76cm" svg:height="0.663cm" svg:x="1.44cm" svg:y="1.355cm">
          <draw:text-box>
            <text:p text:style-name="P9">SUSTENTACIÓN · ANÁLISIS DE ALGORITMOS II</text:p>
          </draw:text-box>
        </draw:frame>
        <draw:frame draw:style-name="gr8" draw:text-style-name="P12" draw:layer="layout" svg:width="20.5cm" svg:height="4.375cm" svg:x="1.25cm" svg:y="2.75cm">
          <draw:text-box>
            <text:p text:style-name="P11">Minimizar la</text:p>
            <text:p text:style-name="P11">polarización</text:p>
          </draw:text-box>
        </draw:frame>
        <draw:frame draw:style-name="gr9" draw:text-style-name="P14" draw:layer="layout" svg:width="19.5cm" svg:height="2.157cm" svg:x="1.32cm" svg:y="6.65cm">
          <draw:text-box>
            <text:p text:style-name="P13">Un modelo entero lineal para decidir movimientos</text:p>
            <text:p text:style-name="P13">bajo presupuesto y distancia limitada</text:p>
          </draw:text-box>
        </draw:frame>
        <draw:rect draw:style-name="gr10" draw:text-style-name="P15" draw:layer="layout" svg:width="7.9cm" svg:height="8.6cm" svg:x="23.5cm" svg:y="2.4cm" draw:corner-radius="0.06cm">
          <text:p/>
        </draw:rect>
        <draw:frame draw:style-name="gr11" draw:text-style-name="P17" draw:layer="layout" svg:width="6cm" svg:height="1.771cm" svg:x="24.4cm" svg:y="3.2cm">
          <draw:text-box>
            <text:p text:style-name="P16">MinPol</text:p>
          </draw:text-box>
        </draw:frame>
        <draw:frame draw:style-name="gr12" draw:text-style-name="P19" draw:layer="layout" svg:width="6.8cm" svg:height="1.246cm" svg:x="24.2cm" svg:y="5.05cm">
          <draw:text-box>
            <text:p text:style-name="P18">min</text:p>
          </draw:text-box>
        </draw:frame>
        <draw:frame draw:style-name="gr13" draw:text-style-name="P21" draw:layer="layout" svg:width="6.9cm" svg:height="1.102cm" svg:x="24cm" svg:y="6.2cm">
          <draw:text-box>
            <text:p text:style-name="P20">Σ yᵢ |vᵢ − med(y)|</text:p>
          </draw:text-box>
        </draw:frame>
        <draw:frame draw:style-name="gr14" draw:text-style-name="P23" draw:layer="layout" svg:width="6cm" svg:height="1.783cm" svg:x="24.45cm" svg:y="8.4cm">
          <draw:text-box>
            <text:p text:style-name="P22">ct <text:s/>· <text:s/>maxM <text:s/>· <text:s/>población</text:p>
          </draw:text-box>
        </draw:frame>
        <draw:frame draw:style-name="gr15" draw:text-style-name="P25" draw:layer="layout" svg:width="4.5cm" svg:height="0.763cm" svg:x="1.25cm" svg:y="10.1cm">
          <draw:text-box>
            <text:p text:style-name="P24">INTEGRANTES</text:p>
          </draw:text-box>
        </draw:frame>
        <draw:rect draw:style-name="gr10" draw:text-style-name="P15" draw:layer="layout" svg:width="14.75cm" svg:height="0.9cm" svg:x="1.25cm" svg:y="10.8cm" draw:corner-radius="0.06cm">
          <text:p/>
        </draw:rect>
        <draw:rect draw:style-name="gr3" draw:text-style-name="P3" draw:layer="layout" svg:width="0.11cm" svg:height="0.9cm" svg:x="1.25cm" svg:y="10.8cm">
          <text:p/>
        </draw:rect>
        <draw:frame draw:style-name="gr16" draw:text-style-name="P27" draw:layer="layout" svg:width="14.1cm" svg:height="0.663cm" svg:x="1.55cm" svg:y="10.99cm">
          <draw:text-box>
            <text:p text:style-name="P26">Juan Carlos Cruz Muñoz <text:s/>· <text:s/>1824389</text:p>
          </draw:text-box>
        </draw:frame>
        <draw:rect draw:style-name="gr10" draw:text-style-name="P15" draw:layer="layout" svg:width="14.75cm" svg:height="0.9cm" svg:x="16.8cm" svg:y="10.8cm" draw:corner-radius="0.06cm">
          <text:p/>
        </draw:rect>
        <draw:rect draw:style-name="gr17" draw:text-style-name="P28" draw:layer="layout" svg:width="0.11cm" svg:height="0.9cm" svg:x="16.8cm" svg:y="10.8cm">
          <text:p/>
        </draw:rect>
        <draw:frame draw:style-name="gr16" draw:text-style-name="P27" draw:layer="layout" svg:width="14.1cm" svg:height="0.663cm" svg:x="17.1cm" svg:y="10.99cm">
          <draw:text-box>
            <text:p text:style-name="P26">David Alejandro Enciso Gutierrez <text:s/>· <text:s/>2240581</text:p>
          </draw:text-box>
        </draw:frame>
        <draw:rect draw:style-name="gr10" draw:text-style-name="P15" draw:layer="layout" svg:width="14.75cm" svg:height="0.9cm" svg:x="1.25cm" svg:y="11.95cm" draw:corner-radius="0.06cm">
          <text:p/>
        </draw:rect>
        <draw:rect draw:style-name="gr3" draw:text-style-name="P3" draw:layer="layout" svg:width="0.11cm" svg:height="0.9cm" svg:x="1.25cm" svg:y="11.95cm">
          <text:p/>
        </draw:rect>
        <draw:frame draw:style-name="gr16" draw:text-style-name="P27" draw:layer="layout" svg:width="14.1cm" svg:height="0.663cm" svg:x="1.55cm" svg:y="12.14cm">
          <draw:text-box>
            <text:p text:style-name="P26">Juan Esteban Rodriguez Valencia <text:s/>· <text:s/>2042282</text:p>
          </draw:text-box>
        </draw:frame>
        <draw:rect draw:style-name="gr10" draw:text-style-name="P15" draw:layer="layout" svg:width="14.75cm" svg:height="0.9cm" svg:x="16.8cm" svg:y="11.95cm" draw:corner-radius="0.06cm">
          <text:p/>
        </draw:rect>
        <draw:rect draw:style-name="gr17" draw:text-style-name="P28" draw:layer="layout" svg:width="0.11cm" svg:height="0.9cm" svg:x="16.8cm" svg:y="11.95cm">
          <text:p/>
        </draw:rect>
        <draw:frame draw:style-name="gr16" draw:text-style-name="P27" draw:layer="layout" svg:width="14.1cm" svg:height="0.663cm" svg:x="17.1cm" svg:y="12.14cm">
          <draw:text-box>
            <text:p text:style-name="P26">Estiven Andres Martinez Granados <text:s/>· <text:s/>2179687</text:p>
          </draw:text-box>
        </draw:frame>
        <draw:frame draw:style-name="gr18" draw:text-style-name="P30" draw:layer="layout" svg:width="18cm" svg:height="0.814cm" svg:x="1.25cm" svg:y="14.2cm">
          <draw:text-box>
            <text:p text:style-name="P29">Universidad del Valle · Julio de 2026</text:p>
          </draw:text-box>
        </draw:fram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rect draw:style-name="gr1" draw:text-style-name="P1" draw:layer="layout" svg:width="33.867cm" svg:height="19.05cm" svg:x="0cm" svg:y="0cm">
          <text:p/>
        </draw:rect>
        <draw:rect draw:style-name="gr2" draw:text-style-name="P2" draw:layer="layout" svg:width="33.867cm" svg:height="0.17cm" svg:x="0cm" svg:y="0cm">
          <text:p/>
        </draw:rect>
        <draw:rect draw:style-name="gr3" draw:text-style-name="P3" draw:layer="layout" svg:width="33.867cm" svg:height="0.055cm" svg:x="0cm" svg:y="0.17cm">
          <text:p/>
        </draw:rect>
        <draw:frame draw:style-name="gr20" draw:text-style-name="P5" draw:layer="layout" svg:width="0.9cm" svg:height="1.077cm" svg:x="1.18cm" svg:y="18.16cm">
          <draw:text-box>
            <text:p text:style-name="P4">02</text:p>
          </draw:text-box>
        </draw:frame>
        <draw:frame draw:style-name="gr20" draw:text-style-name="P7" draw:layer="layout" svg:width="12cm" svg:height="1.077cm" svg:x="2.2cm" svg:y="18.16cm">
          <draw:text-box>
            <text:p text:style-name="P6">Juan Carlos Cruz Muñoz <text:s/>· <text:s/>0:25–0:55</text:p>
          </draw:text-box>
        </draw:frame>
        <draw:rect draw:style-name="gr5" draw:text-style-name="P8" draw:layer="layout" svg:width="5.6cm" svg:height="0.06cm" svg:x="26.9cm" svg:y="18.33cm">
          <text:p/>
        </draw:rect>
        <draw:rect draw:style-name="gr3" draw:text-style-name="P3" draw:layer="layout" svg:width="1.4cm" svg:height="0.06cm" svg:x="26.9cm" svg:y="18.33cm">
          <text:p/>
        </draw:rect>
        <draw:frame draw:style-name="gr20" draw:text-style-name="P25" draw:layer="layout" svg:width="7.2cm" svg:height="1.077cm" svg:x="1.25cm" svg:y="0.7cm">
          <draw:text-box>
            <text:p text:style-name="P24">1 · PARÁMETROS Y VARIABLES</text:p>
          </draw:text-box>
        </draw:frame>
        <draw:frame draw:style-name="gr20" draw:text-style-name="P33" draw:layer="layout" svg:width="31cm" svg:height="1.538cm" svg:x="1.18cm" svg:y="1.28cm">
          <draw:text-box>
            <text:p text:style-name="P32">¿Qué problema resolvemos?</text:p>
          </draw:text-box>
        </draw:frame>
        <draw:frame draw:style-name="gr20" draw:text-style-name="P35" draw:layer="layout" svg:width="30.5cm" svg:height="1.077cm" svg:x="1.25cm" svg:y="2.42cm">
          <draw:text-box>
            <text:p text:style-name="P34">Mover personas solo cuando mejora la distribución y sigue siendo factible</text:p>
          </draw:text-box>
        </draw:frame>
        <draw:rect draw:style-name="gr5" draw:text-style-name="P8" draw:layer="layout" svg:width="31cm" svg:height="0.02cm" svg:x="1.25cm" svg:y="3.23cm">
          <text:p/>
        </draw:rect>
        <draw:rect draw:style-name="gr10" draw:text-style-name="P15" draw:layer="layout" svg:width="7cm" svg:height="3.6cm" svg:x="1.25cm" svg:y="4.7cm" draw:corner-radius="0.06cm">
          <text:p/>
        </draw:rect>
        <draw:frame draw:style-name="gr20" draw:text-style-name="P37" draw:layer="layout" svg:width="0.9cm" svg:height="1.077cm" svg:x="1.6cm" svg:y="5.05cm">
          <draw:text-box>
            <text:p text:style-name="P36">01</text:p>
          </draw:text-box>
        </draw:frame>
        <draw:frame draw:style-name="gr20" draw:text-style-name="P39" draw:layer="layout" svg:width="6.25cm" svg:height="1.149cm" svg:x="1.6cm" svg:y="5.85cm">
          <draw:text-box>
            <text:p text:style-name="P38">Estado inicial</text:p>
          </draw:text-box>
        </draw:frame>
        <draw:frame draw:style-name="gr20" draw:text-style-name="P35" draw:layer="layout" svg:width="6.25cm" svg:height="1.673cm" svg:x="1.6cm" svg:y="6.8cm">
          <draw:text-box>
            <text:p text:style-name="P34">p = personas por opinión</text:p>
          </draw:text-box>
        </draw:frame>
        <draw:line draw:style-name="gr21" draw:text-style-name="P40" draw:layer="layout" svg:x1="8.3cm" svg:y1="6.5cm" svg:x2="9.15cm" svg:y2="6.5cm">
          <text:p/>
        </draw:line>
        <draw:rect draw:style-name="gr10" draw:text-style-name="P15" draw:layer="layout" svg:width="7cm" svg:height="3.6cm" svg:x="9.2cm" svg:y="4.7cm" draw:corner-radius="0.06cm">
          <text:p/>
        </draw:rect>
        <draw:frame draw:style-name="gr20" draw:text-style-name="P42" draw:layer="layout" svg:width="0.9cm" svg:height="1.077cm" svg:x="9.55cm" svg:y="5.05cm">
          <draw:text-box>
            <text:p text:style-name="P41">02</text:p>
          </draw:text-box>
        </draw:frame>
        <draw:frame draw:style-name="gr20" draw:text-style-name="P39" draw:layer="layout" svg:width="6.25cm" svg:height="1.149cm" svg:x="9.55cm" svg:y="5.85cm">
          <draw:text-box>
            <text:p text:style-name="P38">Decisión</text:p>
          </draw:text-box>
        </draw:frame>
        <draw:frame draw:style-name="gr20" draw:text-style-name="P35" draw:layer="layout" svg:width="6.25cm" svg:height="1.077cm" svg:x="9.55cm" svg:y="6.8cm">
          <draw:text-box>
            <text:p text:style-name="P34">xᵢⱼ = personas de i a j</text:p>
          </draw:text-box>
        </draw:frame>
        <draw:line draw:style-name="gr22" draw:text-style-name="P40" draw:layer="layout" svg:x1="16.25cm" svg:y1="6.5cm" svg:x2="17.1cm" svg:y2="6.5cm">
          <text:p/>
        </draw:line>
        <draw:rect draw:style-name="gr10" draw:text-style-name="P15" draw:layer="layout" svg:width="7cm" svg:height="3.6cm" svg:x="17.15cm" svg:y="4.7cm" draw:corner-radius="0.06cm">
          <text:p/>
        </draw:rect>
        <draw:frame draw:style-name="gr20" draw:text-style-name="P44" draw:layer="layout" svg:width="0.9cm" svg:height="1.077cm" svg:x="17.5cm" svg:y="5.05cm">
          <draw:text-box>
            <text:p text:style-name="P43">03</text:p>
          </draw:text-box>
        </draw:frame>
        <draw:frame draw:style-name="gr20" draw:text-style-name="P39" draw:layer="layout" svg:width="6.25cm" svg:height="1.149cm" svg:x="17.5cm" svg:y="5.85cm">
          <draw:text-box>
            <text:p text:style-name="P38">Estado final</text:p>
          </draw:text-box>
        </draw:frame>
        <draw:frame draw:style-name="gr20" draw:text-style-name="P35" draw:layer="layout" svg:width="6.25cm" svg:height="1.077cm" svg:x="17.5cm" svg:y="6.8cm">
          <draw:text-box>
            <text:p text:style-name="P34">y = entradas − salidas</text:p>
          </draw:text-box>
        </draw:frame>
        <draw:line draw:style-name="gr23" draw:text-style-name="P40" draw:layer="layout" svg:x1="24.2cm" svg:y1="6.5cm" svg:x2="25.05cm" svg:y2="6.5cm">
          <text:p/>
        </draw:line>
        <draw:rect draw:style-name="gr10" draw:text-style-name="P15" draw:layer="layout" svg:width="7cm" svg:height="3.6cm" svg:x="25.1cm" svg:y="4.7cm" draw:corner-radius="0.06cm">
          <text:p/>
        </draw:rect>
        <draw:frame draw:style-name="gr20" draw:text-style-name="P46" draw:layer="layout" svg:width="0.9cm" svg:height="1.077cm" svg:x="25.45cm" svg:y="5.05cm">
          <draw:text-box>
            <text:p text:style-name="P45">04</text:p>
          </draw:text-box>
        </draw:frame>
        <draw:frame draw:style-name="gr20" draw:text-style-name="P39" draw:layer="layout" svg:width="6.25cm" svg:height="1.149cm" svg:x="25.45cm" svg:y="5.85cm">
          <draw:text-box>
            <text:p text:style-name="P38">Resultado</text:p>
          </draw:text-box>
        </draw:frame>
        <draw:frame draw:style-name="gr20" draw:text-style-name="P35" draw:layer="layout" svg:width="6.25cm" svg:height="1.077cm" svg:x="25.45cm" svg:y="6.8cm">
          <draw:text-box>
            <text:p text:style-name="P34">mínima polarización</text:p>
          </draw:text-box>
        </draw:frame>
        <draw:rect draw:style-name="gr24" draw:text-style-name="P15" draw:layer="layout" svg:width="14.8cm" svg:height="4cm" svg:x="1.25cm" svg:y="9.5cm" draw:corner-radius="0.04cm">
          <text:p/>
        </draw:rect>
        <draw:rect draw:style-name="gr25" draw:text-style-name="P47" draw:layer="layout" svg:width="0.07cm" svg:height="4cm" svg:x="1.25cm" svg:y="9.5cm">
          <text:p/>
        </draw:rect>
        <draw:frame draw:style-name="gr20" draw:text-style-name="P49" draw:layer="layout" svg:width="14.15cm" svg:height="1.2cm" svg:x="1.61cm" svg:y="9.76cm">
          <draw:text-box>
            <text:p text:style-name="P48">OBJETIVO</text:p>
          </draw:text-box>
        </draw:frame>
        <draw:frame draw:style-name="gr20" draw:text-style-name="P51" draw:layer="layout" svg:width="14.15cm" svg:height="2.259cm" svg:x="1.61cm" svg:y="10.48cm">
          <draw:text-box>
            <text:p text:style-name="P50">Minimizar la suma de distancias a la mediana ponderada final.</text:p>
          </draw:text-box>
        </draw:frame>
        <draw:rect draw:style-name="gr24" draw:text-style-name="P15" draw:layer="layout" svg:width="14.8cm" svg:height="4cm" svg:x="16.8cm" svg:y="9.5cm" draw:corner-radius="0.04cm">
          <text:p/>
        </draw:rect>
        <draw:rect draw:style-name="gr17" draw:text-style-name="P28" draw:layer="layout" svg:width="0.07cm" svg:height="4cm" svg:x="16.8cm" svg:y="9.5cm">
          <text:p/>
        </draw:rect>
        <draw:frame draw:style-name="gr20" draw:text-style-name="P53" draw:layer="layout" svg:width="14.15cm" svg:height="1.2cm" svg:x="17.16cm" svg:y="9.76cm">
          <draw:text-box>
            <text:p text:style-name="P52">FACTIBILIDAD</text:p>
          </draw:text-box>
        </draw:frame>
        <draw:frame draw:style-name="gr20" draw:text-style-name="P51" draw:layer="layout" svg:width="14.15cm" svg:height="2.259cm" svg:x="17.16cm" svg:y="10.48cm">
          <draw:text-box>
            <text:p text:style-name="P50">Presupuesto ct <text:s/>+ <text:s/>máximo de movimientos maxM <text:s/>+ <text:s/>conservación.</text:p>
          </draw:text-box>
        </draw:frame>
        <presentation:notes draw:style-name="dp2">
          <draw:page-thumbnail draw:style-name="gr19" draw:layer="layout" svg:width="19.798cm" svg:height="11.136cm" svg:x="0.6cm" svg:y="2.257cm" draw:page-number="2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rect draw:style-name="gr1" draw:text-style-name="P1" draw:layer="layout" svg:width="33.867cm" svg:height="19.05cm" svg:x="0cm" svg:y="0cm">
          <text:p/>
        </draw:rect>
        <draw:rect draw:style-name="gr2" draw:text-style-name="P2" draw:layer="layout" svg:width="33.867cm" svg:height="0.17cm" svg:x="0cm" svg:y="0cm">
          <text:p/>
        </draw:rect>
        <draw:rect draw:style-name="gr3" draw:text-style-name="P3" draw:layer="layout" svg:width="33.867cm" svg:height="0.055cm" svg:x="0cm" svg:y="0.17cm">
          <text:p/>
        </draw:rect>
        <draw:frame draw:style-name="gr20" draw:text-style-name="P5" draw:layer="layout" svg:width="0.9cm" svg:height="1.077cm" svg:x="1.18cm" svg:y="18.16cm">
          <draw:text-box>
            <text:p text:style-name="P4">03</text:p>
          </draw:text-box>
        </draw:frame>
        <draw:frame draw:style-name="gr20" draw:text-style-name="P7" draw:layer="layout" svg:width="12cm" svg:height="1.077cm" svg:x="2.2cm" svg:y="18.16cm">
          <draw:text-box>
            <text:p text:style-name="P6">Juan Carlos Cruz Muñoz <text:s/>· <text:s/>0:55–1:50</text:p>
          </draw:text-box>
        </draw:frame>
        <draw:rect draw:style-name="gr5" draw:text-style-name="P8" draw:layer="layout" svg:width="5.6cm" svg:height="0.06cm" svg:x="26.9cm" svg:y="18.33cm">
          <text:p/>
        </draw:rect>
        <draw:rect draw:style-name="gr3" draw:text-style-name="P3" draw:layer="layout" svg:width="1.4cm" svg:height="0.06cm" svg:x="26.9cm" svg:y="18.33cm">
          <text:p/>
        </draw:rect>
        <draw:frame draw:style-name="gr20" draw:text-style-name="P25" draw:layer="layout" svg:width="7.2cm" svg:height="1.077cm" svg:x="1.25cm" svg:y="0.7cm">
          <draw:text-box>
            <text:p text:style-name="P24">1 · PARÁMETROS Y VARIABLES</text:p>
          </draw:text-box>
        </draw:frame>
        <draw:frame draw:style-name="gr20" draw:text-style-name="P33" draw:layer="layout" svg:width="31cm" svg:height="1.538cm" svg:x="1.18cm" svg:y="1.28cm">
          <draw:text-box>
            <text:p text:style-name="P32">Los datos que describen una instancia</text:p>
          </draw:text-box>
        </draw:frame>
        <draw:frame draw:style-name="gr20" draw:text-style-name="P35" draw:layer="layout" svg:width="30.5cm" svg:height="1.077cm" svg:x="1.25cm" svg:y="2.42cm">
          <draw:text-box>
            <text:p text:style-name="P34">O = {1,…,m} · <text:s/>Σ pᵢ = n · <text:s/>0 ≤ vᵢ ≤ 1</text:p>
          </draw:text-box>
        </draw:frame>
        <draw:rect draw:style-name="gr5" draw:text-style-name="P8" draw:layer="layout" svg:width="31cm" svg:height="0.02cm" svg:x="1.25cm" svg:y="3.23cm">
          <text:p/>
        </draw:rect>
        <draw:rect draw:style-name="gr24" draw:text-style-name="P15" draw:layer="layout" svg:width="7.3cm" svg:height="3.6cm" svg:x="1.25cm" svg:y="3.95cm" draw:corner-radius="0.04cm">
          <text:p/>
        </draw:rect>
        <draw:rect draw:style-name="gr3" draw:text-style-name="P3" draw:layer="layout" svg:width="0.07cm" svg:height="3.6cm" svg:x="1.25cm" svg:y="3.95cm">
          <text:p/>
        </draw:rect>
        <draw:frame draw:style-name="gr20" draw:text-style-name="P55" draw:layer="layout" svg:width="6.65cm" svg:height="1.2cm" svg:x="1.61cm" svg:y="4.21cm">
          <draw:text-box>
            <text:p text:style-name="P54">n · m</text:p>
          </draw:text-box>
        </draw:frame>
        <draw:frame draw:style-name="gr20" draw:text-style-name="P57" draw:layer="layout" svg:width="6.65cm" svg:height="1.673cm" svg:x="1.61cm" svg:y="4.93cm">
          <draw:text-box>
            <text:p text:style-name="P56">Personas totales · opiniones disponibles</text:p>
          </draw:text-box>
        </draw:frame>
        <draw:rect draw:style-name="gr24" draw:text-style-name="P15" draw:layer="layout" svg:width="7.3cm" svg:height="3.6cm" svg:x="9.15cm" svg:y="3.95cm" draw:corner-radius="0.04cm">
          <text:p/>
        </draw:rect>
        <draw:rect draw:style-name="gr26" draw:text-style-name="P58" draw:layer="layout" svg:width="0.07cm" svg:height="3.6cm" svg:x="9.15cm" svg:y="3.95cm">
          <text:p/>
        </draw:rect>
        <draw:frame draw:style-name="gr20" draw:text-style-name="P60" draw:layer="layout" svg:width="6.65cm" svg:height="1.2cm" svg:x="9.51cm" svg:y="4.21cm">
          <draw:text-box>
            <text:p text:style-name="P59">pᵢ</text:p>
          </draw:text-box>
        </draw:frame>
        <draw:frame draw:style-name="gr20" draw:text-style-name="P57" draw:layer="layout" svg:width="6.65cm" svg:height="1.673cm" svg:x="9.51cm" svg:y="4.93cm">
          <draw:text-box>
            <text:p text:style-name="P56">Población inicial en la opinión i</text:p>
          </draw:text-box>
        </draw:frame>
        <draw:rect draw:style-name="gr24" draw:text-style-name="P15" draw:layer="layout" svg:width="7.3cm" svg:height="3.6cm" svg:x="17.05cm" svg:y="3.95cm" draw:corner-radius="0.04cm">
          <text:p/>
        </draw:rect>
        <draw:rect draw:style-name="gr25" draw:text-style-name="P47" draw:layer="layout" svg:width="0.07cm" svg:height="3.6cm" svg:x="17.05cm" svg:y="3.95cm">
          <text:p/>
        </draw:rect>
        <draw:frame draw:style-name="gr20" draw:text-style-name="P49" draw:layer="layout" svg:width="6.65cm" svg:height="1.2cm" svg:x="17.41cm" svg:y="4.21cm">
          <draw:text-box>
            <text:p text:style-name="P48">vᵢ</text:p>
          </draw:text-box>
        </draw:frame>
        <draw:frame draw:style-name="gr20" draw:text-style-name="P57" draw:layer="layout" svg:width="6.65cm" svg:height="1.673cm" svg:x="17.41cm" svg:y="4.93cm">
          <draw:text-box>
            <text:p text:style-name="P56">Valor numérico asociado a i</text:p>
          </draw:text-box>
        </draw:frame>
        <draw:rect draw:style-name="gr24" draw:text-style-name="P15" draw:layer="layout" svg:width="7.3cm" svg:height="3.6cm" svg:x="24.95cm" svg:y="3.95cm" draw:corner-radius="0.04cm">
          <text:p/>
        </draw:rect>
        <draw:rect draw:style-name="gr17" draw:text-style-name="P28" draw:layer="layout" svg:width="0.07cm" svg:height="3.6cm" svg:x="24.95cm" svg:y="3.95cm">
          <text:p/>
        </draw:rect>
        <draw:frame draw:style-name="gr20" draw:text-style-name="P53" draw:layer="layout" svg:width="6.65cm" svg:height="1.2cm" svg:x="25.31cm" svg:y="4.21cm">
          <draw:text-box>
            <text:p text:style-name="P52">cᵢⱼ</text:p>
          </draw:text-box>
        </draw:frame>
        <draw:frame draw:style-name="gr20" draw:text-style-name="P57" draw:layer="layout" svg:width="6.65cm" svg:height="1.673cm" svg:x="25.31cm" svg:y="4.93cm">
          <draw:text-box>
            <text:p text:style-name="P56">Costo base de trasladar i → j</text:p>
          </draw:text-box>
        </draw:frame>
        <draw:rect draw:style-name="gr24" draw:text-style-name="P15" draw:layer="layout" svg:width="7.3cm" svg:height="3.6cm" svg:x="1.25cm" svg:y="8.25cm" draw:corner-radius="0.04cm">
          <text:p/>
        </draw:rect>
        <draw:rect draw:style-name="gr27" draw:text-style-name="P61" draw:layer="layout" svg:width="0.07cm" svg:height="3.6cm" svg:x="1.25cm" svg:y="8.25cm">
          <text:p/>
        </draw:rect>
        <draw:frame draw:style-name="gr20" draw:text-style-name="P63" draw:layer="layout" svg:width="6.65cm" svg:height="1.2cm" svg:x="1.61cm" svg:y="8.51cm">
          <draw:text-box>
            <text:p text:style-name="P62">ceⱼ</text:p>
          </draw:text-box>
        </draw:frame>
        <draw:frame draw:style-name="gr20" draw:text-style-name="P57" draw:layer="layout" svg:width="6.65cm" svg:height="1.673cm" svg:x="1.61cm" svg:y="9.23cm">
          <draw:text-box>
            <text:p text:style-name="P56">Recargo si el destino estaba vacío</text:p>
          </draw:text-box>
        </draw:frame>
        <draw:rect draw:style-name="gr24" draw:text-style-name="P15" draw:layer="layout" svg:width="7.3cm" svg:height="3.6cm" svg:x="9.15cm" svg:y="8.25cm" draw:corner-radius="0.04cm">
          <text:p/>
        </draw:rect>
        <draw:rect draw:style-name="gr17" draw:text-style-name="P28" draw:layer="layout" svg:width="0.07cm" svg:height="3.6cm" svg:x="9.15cm" svg:y="8.25cm">
          <text:p/>
        </draw:rect>
        <draw:frame draw:style-name="gr20" draw:text-style-name="P53" draw:layer="layout" svg:width="6.65cm" svg:height="1.2cm" svg:x="9.51cm" svg:y="8.51cm">
          <draw:text-box>
            <text:p text:style-name="P52">ct</text:p>
          </draw:text-box>
        </draw:frame>
        <draw:frame draw:style-name="gr20" draw:text-style-name="P57" draw:layer="layout" svg:width="6.65cm" svg:height="1.673cm" svg:x="9.51cm" svg:y="9.23cm">
          <draw:text-box>
            <text:p text:style-name="P56">Presupuesto máximo disponible</text:p>
          </draw:text-box>
        </draw:frame>
        <draw:rect draw:style-name="gr24" draw:text-style-name="P15" draw:layer="layout" svg:width="7.3cm" svg:height="3.6cm" svg:x="17.05cm" svg:y="8.25cm" draw:corner-radius="0.04cm">
          <text:p/>
        </draw:rect>
        <draw:rect draw:style-name="gr26" draw:text-style-name="P58" draw:layer="layout" svg:width="0.07cm" svg:height="3.6cm" svg:x="17.05cm" svg:y="8.25cm">
          <text:p/>
        </draw:rect>
        <draw:frame draw:style-name="gr20" draw:text-style-name="P60" draw:layer="layout" svg:width="6.65cm" svg:height="1.2cm" svg:x="17.41cm" svg:y="8.51cm">
          <draw:text-box>
            <text:p text:style-name="P59">maxM</text:p>
          </draw:text-box>
        </draw:frame>
        <draw:frame draw:style-name="gr20" draw:text-style-name="P57" draw:layer="layout" svg:width="6.65cm" svg:height="1.673cm" svg:x="17.41cm" svg:y="9.23cm">
          <draw:text-box>
            <text:p text:style-name="P56">Distancia total máxima permitida</text:p>
          </draw:text-box>
        </draw:frame>
        <draw:rect draw:style-name="gr24" draw:text-style-name="P15" draw:layer="layout" svg:width="7.3cm" svg:height="3.6cm" svg:x="24.95cm" svg:y="8.25cm" draw:corner-radius="0.04cm">
          <text:p/>
        </draw:rect>
        <draw:rect draw:style-name="gr3" draw:text-style-name="P3" draw:layer="layout" svg:width="0.07cm" svg:height="3.6cm" svg:x="24.95cm" svg:y="8.25cm">
          <text:p/>
        </draw:rect>
        <draw:frame draw:style-name="gr20" draw:text-style-name="P55" draw:layer="layout" svg:width="6.65cm" svg:height="1.2cm" svg:x="25.31cm" svg:y="8.51cm">
          <draw:text-box>
            <text:p text:style-name="P54">eⱼ</text:p>
          </draw:text-box>
        </draw:frame>
        <draw:frame draw:style-name="gr20" draw:text-style-name="P57" draw:layer="layout" svg:width="6.65cm" svg:height="1.077cm" svg:x="25.31cm" svg:y="9.23cm">
          <draw:text-box>
            <text:p text:style-name="P56">1 si pⱼ = 0; 0 en otro caso</text:p>
          </draw:text-box>
        </draw:frame>
        <draw:rect draw:style-name="gr28" draw:text-style-name="P64" draw:layer="layout" svg:width="31cm" svg:height="1.9cm" svg:x="1.25cm" svg:y="13.2cm" draw:corner-radius="0.06cm">
          <text:p/>
        </draw:rect>
        <draw:frame draw:style-name="gr20" draw:text-style-name="P66" draw:layer="layout" svg:width="6.7cm" svg:height="1.077cm" svg:x="1.8cm" svg:y="13.65cm">
          <draw:text-box>
            <text:p text:style-name="P65">costo unitario efectivo</text:p>
          </draw:text-box>
        </draw:frame>
        <draw:frame draw:style-name="gr20" draw:text-style-name="P68" draw:layer="layout" svg:width="22cm" svg:height="1.339cm" svg:x="8.5cm" svg:y="13.52cm">
          <draw:text-box>
            <text:p text:style-name="P67">aᵢⱼ = cᵢⱼ (1 + pᵢ / n) + eⱼ · ceⱼ</text:p>
          </draw:text-box>
        </draw:frame>
        <presentation:notes draw:style-name="dp2">
          <draw:page-thumbnail draw:style-name="gr19" draw:layer="layout" svg:width="19.798cm" svg:height="11.136cm" svg:x="0.6cm" svg:y="2.257cm" draw:page-number="3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rect draw:style-name="gr1" draw:text-style-name="P1" draw:layer="layout" svg:width="33.867cm" svg:height="19.05cm" svg:x="0cm" svg:y="0cm">
          <text:p/>
        </draw:rect>
        <draw:rect draw:style-name="gr2" draw:text-style-name="P2" draw:layer="layout" svg:width="33.867cm" svg:height="0.17cm" svg:x="0cm" svg:y="0cm">
          <text:p/>
        </draw:rect>
        <draw:rect draw:style-name="gr3" draw:text-style-name="P3" draw:layer="layout" svg:width="33.867cm" svg:height="0.055cm" svg:x="0cm" svg:y="0.17cm">
          <text:p/>
        </draw:rect>
        <draw:frame draw:style-name="gr20" draw:text-style-name="P5" draw:layer="layout" svg:width="0.9cm" svg:height="1.077cm" svg:x="1.18cm" svg:y="18.16cm">
          <draw:text-box>
            <text:p text:style-name="P4">04</text:p>
          </draw:text-box>
        </draw:frame>
        <draw:frame draw:style-name="gr20" draw:text-style-name="P7" draw:layer="layout" svg:width="12cm" svg:height="1.077cm" svg:x="2.2cm" svg:y="18.16cm">
          <draw:text-box>
            <text:p text:style-name="P6">Juan Carlos Cruz Muñoz <text:s/>· <text:s/>1:50–3:00</text:p>
          </draw:text-box>
        </draw:frame>
        <draw:rect draw:style-name="gr5" draw:text-style-name="P8" draw:layer="layout" svg:width="5.6cm" svg:height="0.06cm" svg:x="26.9cm" svg:y="18.33cm">
          <text:p/>
        </draw:rect>
        <draw:rect draw:style-name="gr3" draw:text-style-name="P3" draw:layer="layout" svg:width="1.4cm" svg:height="0.06cm" svg:x="26.9cm" svg:y="18.33cm">
          <text:p/>
        </draw:rect>
        <draw:frame draw:style-name="gr20" draw:text-style-name="P25" draw:layer="layout" svg:width="7.2cm" svg:height="1.077cm" svg:x="1.25cm" svg:y="0.7cm">
          <draw:text-box>
            <text:p text:style-name="P24">1 · PARÁMETROS Y VARIABLES</text:p>
          </draw:text-box>
        </draw:frame>
        <draw:frame draw:style-name="gr20" draw:text-style-name="P33" draw:layer="layout" svg:width="31cm" svg:height="1.538cm" svg:x="1.18cm" svg:y="1.28cm">
          <draw:text-box>
            <text:p text:style-name="P32">Cuatro familias de variables de decisión</text:p>
          </draw:text-box>
        </draw:frame>
        <draw:frame draw:style-name="gr20" draw:text-style-name="P35" draw:layer="layout" svg:width="30.5cm" svg:height="1.077cm" svg:x="1.25cm" svg:y="2.42cm">
          <draw:text-box>
            <text:p text:style-name="P34">Todas son enteras o binarias: programación entera lineal (IP/PLE)</text:p>
          </draw:text-box>
        </draw:frame>
        <draw:rect draw:style-name="gr5" draw:text-style-name="P8" draw:layer="layout" svg:width="31cm" svg:height="0.02cm" svg:x="1.25cm" svg:y="3.23cm">
          <text:p/>
        </draw:rect>
        <draw:rect draw:style-name="gr10" draw:text-style-name="P15" draw:layer="layout" svg:width="7.3cm" svg:height="4.1cm" svg:x="1.25cm" svg:y="4cm" draw:corner-radius="0.06cm">
          <text:p/>
        </draw:rect>
        <draw:frame draw:style-name="gr20" draw:text-style-name="P17" draw:layer="layout" svg:width="6.8cm" svg:height="1.771cm" svg:x="1.5cm" svg:y="4.45cm">
          <draw:text-box>
            <text:p text:style-name="P16">xᵢⱼ</text:p>
          </draw:text-box>
        </draw:frame>
        <draw:frame draw:style-name="gr20" draw:text-style-name="P70" draw:layer="layout" svg:width="6.6cm" svg:height="1.783cm" svg:x="1.6cm" svg:y="6.05cm">
          <draw:text-box>
            <text:p text:style-name="P69">personas que pasan de i a j</text:p>
          </draw:text-box>
        </draw:frame>
        <draw:rect draw:style-name="gr10" draw:text-style-name="P15" draw:layer="layout" svg:width="7.3cm" svg:height="4.1cm" svg:x="9.15cm" svg:y="4cm" draw:corner-radius="0.06cm">
          <text:p/>
        </draw:rect>
        <draw:frame draw:style-name="gr20" draw:text-style-name="P72" draw:layer="layout" svg:width="6.8cm" svg:height="1.771cm" svg:x="9.4cm" svg:y="4.45cm">
          <draw:text-box>
            <text:p text:style-name="P71">yᵢ</text:p>
          </draw:text-box>
        </draw:frame>
        <draw:frame draw:style-name="gr20" draw:text-style-name="P70" draw:layer="layout" svg:width="6.6cm" svg:height="1.077cm" svg:x="9.5cm" svg:y="6.05cm">
          <draw:text-box>
            <text:p text:style-name="P69">personas finales en i</text:p>
          </draw:text-box>
        </draw:frame>
        <draw:rect draw:style-name="gr10" draw:text-style-name="P15" draw:layer="layout" svg:width="7.3cm" svg:height="4.1cm" svg:x="17.05cm" svg:y="4cm" draw:corner-radius="0.06cm">
          <text:p/>
        </draw:rect>
        <draw:frame draw:style-name="gr20" draw:text-style-name="P74" draw:layer="layout" svg:width="6.8cm" svg:height="1.771cm" svg:x="17.3cm" svg:y="4.45cm">
          <draw:text-box>
            <text:p text:style-name="P73">zₖ</text:p>
          </draw:text-box>
        </draw:frame>
        <draw:frame draw:style-name="gr20" draw:text-style-name="P70" draw:layer="layout" svg:width="6.6cm" svg:height="1.077cm" svg:x="17.4cm" svg:y="6.05cm">
          <draw:text-box>
            <text:p text:style-name="P69">1 si vₖ es la mediana</text:p>
          </draw:text-box>
        </draw:frame>
        <draw:rect draw:style-name="gr10" draw:text-style-name="P15" draw:layer="layout" svg:width="7.3cm" svg:height="4.1cm" svg:x="24.95cm" svg:y="4cm" draw:corner-radius="0.06cm">
          <text:p/>
        </draw:rect>
        <draw:frame draw:style-name="gr20" draw:text-style-name="P76" draw:layer="layout" svg:width="6.8cm" svg:height="1.771cm" svg:x="25.2cm" svg:y="4.45cm">
          <draw:text-box>
            <text:p text:style-name="P75">qᵢₖ</text:p>
          </draw:text-box>
        </draw:frame>
        <draw:frame draw:style-name="gr20" draw:text-style-name="P70" draw:layer="layout" svg:width="6.6cm" svg:height="1.783cm" svg:x="25.3cm" svg:y="6.05cm">
          <draw:text-box>
            <text:p text:style-name="P69">producto linealizado yᵢzₖ</text:p>
          </draw:text-box>
        </draw:frame>
        <draw:rect draw:style-name="gr24" draw:text-style-name="P15" draw:layer="layout" svg:width="14.6cm" svg:height="4.2cm" svg:x="1.25cm" svg:y="9.2cm" draw:corner-radius="0.04cm">
          <text:p/>
        </draw:rect>
        <draw:rect draw:style-name="gr3" draw:text-style-name="P3" draw:layer="layout" svg:width="0.07cm" svg:height="4.2cm" svg:x="1.25cm" svg:y="9.2cm">
          <text:p/>
        </draw:rect>
        <draw:frame draw:style-name="gr20" draw:text-style-name="P55" draw:layer="layout" svg:width="13.95cm" svg:height="1.2cm" svg:x="1.61cm" svg:y="9.46cm">
          <draw:text-box>
            <text:p text:style-name="P54">EN MINIZINC</text:p>
          </draw:text-box>
        </draw:frame>
        <draw:frame draw:style-name="gr20" draw:text-style-name="P78" draw:layer="layout" svg:width="13.95cm" svg:height="3.165cm" svg:x="1.61cm" svg:y="10.18cm">
          <draw:text-box>
            <text:p text:style-name="P77">x, y, q ∈ 0..n</text:p>
            <text:p text:style-name="P77">z ∈ 0..1</text:p>
            <text:p text:style-name="P77">índices sobre 1..m</text:p>
          </draw:text-box>
        </draw:frame>
        <draw:rect draw:style-name="gr24" draw:text-style-name="P15" draw:layer="layout" svg:width="15.65cm" svg:height="4.2cm" svg:x="16.6cm" svg:y="9.2cm" draw:corner-radius="0.04cm">
          <text:p/>
        </draw:rect>
        <draw:rect draw:style-name="gr17" draw:text-style-name="P28" draw:layer="layout" svg:width="0.07cm" svg:height="4.2cm" svg:x="16.6cm" svg:y="9.2cm">
          <text:p/>
        </draw:rect>
        <draw:frame draw:style-name="gr20" draw:text-style-name="P53" draw:layer="layout" svg:width="15cm" svg:height="1.2cm" svg:x="16.96cm" svg:y="9.46cm">
          <draw:text-box>
            <text:p text:style-name="P52">DECIMALES EXACTOS</text:p>
          </draw:text-box>
        </draw:frame>
        <draw:frame draw:style-name="gr20" draw:text-style-name="P80" draw:layer="layout" svg:width="15cm" svg:height="1.961cm" svg:x="16.96cm" svg:y="10.18cm">
          <draw:text-box>
            <text:p text:style-name="P79">v, c, ce y ct llegan como enteros escalados.</text:p>
            <text:p text:style-name="P79">Misma factibilidad; sin ruido binario.</text:p>
          </draw:text-box>
        </draw:frame>
        <presentation:notes draw:style-name="dp2">
          <draw:page-thumbnail draw:style-name="gr19" draw:layer="layout" svg:width="19.798cm" svg:height="11.136cm" svg:x="0.6cm" svg:y="2.257cm" draw:page-number="4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rect draw:style-name="gr1" draw:text-style-name="P1" draw:layer="layout" svg:width="33.867cm" svg:height="19.05cm" svg:x="0cm" svg:y="0cm">
          <text:p/>
        </draw:rect>
        <draw:rect draw:style-name="gr2" draw:text-style-name="P2" draw:layer="layout" svg:width="33.867cm" svg:height="0.17cm" svg:x="0cm" svg:y="0cm">
          <text:p/>
        </draw:rect>
        <draw:rect draw:style-name="gr17" draw:text-style-name="P28" draw:layer="layout" svg:width="33.867cm" svg:height="0.055cm" svg:x="0cm" svg:y="0.17cm">
          <text:p/>
        </draw:rect>
        <draw:frame draw:style-name="gr20" draw:text-style-name="P5" draw:layer="layout" svg:width="0.9cm" svg:height="1.077cm" svg:x="1.18cm" svg:y="18.16cm">
          <draw:text-box>
            <text:p text:style-name="P4">05</text:p>
          </draw:text-box>
        </draw:frame>
        <draw:frame draw:style-name="gr20" draw:text-style-name="P7" draw:layer="layout" svg:width="12cm" svg:height="1.077cm" svg:x="2.2cm" svg:y="18.16cm">
          <draw:text-box>
            <text:p text:style-name="P6">David Alejandro Enciso Gutierrez <text:s/>· <text:s/>3:00–3:45</text:p>
          </draw:text-box>
        </draw:frame>
        <draw:rect draw:style-name="gr5" draw:text-style-name="P8" draw:layer="layout" svg:width="5.6cm" svg:height="0.06cm" svg:x="26.9cm" svg:y="18.33cm">
          <text:p/>
        </draw:rect>
        <draw:rect draw:style-name="gr17" draw:text-style-name="P28" draw:layer="layout" svg:width="2.8cm" svg:height="0.06cm" svg:x="26.9cm" svg:y="18.33cm">
          <text:p/>
        </draw:rect>
        <draw:frame draw:style-name="gr20" draw:text-style-name="P25" draw:layer="layout" svg:width="7.2cm" svg:height="1.077cm" svg:x="1.25cm" svg:y="0.7cm">
          <draw:text-box>
            <text:p text:style-name="P24">2 · RESTRICCIONES Y OBJETIVO</text:p>
          </draw:text-box>
        </draw:frame>
        <draw:frame draw:style-name="gr20" draw:text-style-name="P33" draw:layer="layout" svg:width="31cm" svg:height="1.538cm" svg:x="1.18cm" svg:y="1.28cm">
          <draw:text-box>
            <text:p text:style-name="P32">Primero: que cada movimiento tenga sentido</text:p>
          </draw:text-box>
        </draw:frame>
        <draw:frame draw:style-name="gr20" draw:text-style-name="P35" draw:layer="layout" svg:width="30.5cm" svg:height="1.077cm" svg:x="1.25cm" svg:y="2.42cm">
          <draw:text-box>
            <text:p text:style-name="P34">Disponibilidad, balance y conservación de la población</text:p>
          </draw:text-box>
        </draw:frame>
        <draw:rect draw:style-name="gr5" draw:text-style-name="P8" draw:layer="layout" svg:width="31cm" svg:height="0.02cm" svg:x="1.25cm" svg:y="3.23cm">
          <text:p/>
        </draw:rect>
        <draw:rect draw:style-name="gr10" draw:text-style-name="P15" draw:layer="layout" svg:width="31cm" svg:height="2.8cm" svg:x="1.25cm" svg:y="3.9cm" draw:corner-radius="0.06cm">
          <text:p/>
        </draw:rect>
        <draw:rect draw:style-name="gr3" draw:text-style-name="P3" draw:layer="layout" svg:width="0.25cm" svg:height="2.8cm" svg:x="1.25cm" svg:y="3.9cm">
          <text:p/>
        </draw:rect>
        <draw:frame draw:style-name="gr20" draw:text-style-name="P82" draw:layer="layout" svg:width="6.5cm" svg:height="2.063cm" svg:x="1.85cm" svg:y="4.28cm">
          <draw:text-box>
            <text:p text:style-name="P81">Sin automovimientos</text:p>
          </draw:text-box>
        </draw:frame>
        <draw:frame draw:style-name="gr20" draw:text-style-name="P84" draw:layer="layout" svg:width="14.2cm" svg:height="1.297cm" svg:x="8.3cm" svg:y="4.38cm">
          <draw:text-box>
            <text:p text:style-name="P83">xᵢᵢ = 0</text:p>
          </draw:text-box>
        </draw:frame>
        <draw:frame draw:style-name="gr20" draw:text-style-name="P86" draw:layer="layout" svg:width="7.9cm" svg:height="1.077cm" svg:x="23.2cm" svg:y="4.3cm">
          <draw:text-box>
            <text:p text:style-name="P85">Quedarse en i no es mover</text:p>
          </draw:text-box>
        </draw:frame>
        <draw:rect draw:style-name="gr10" draw:text-style-name="P15" draw:layer="layout" svg:width="31cm" svg:height="2.8cm" svg:x="1.25cm" svg:y="7.4cm" draw:corner-radius="0.06cm">
          <text:p/>
        </draw:rect>
        <draw:rect draw:style-name="gr17" draw:text-style-name="P28" draw:layer="layout" svg:width="0.25cm" svg:height="2.8cm" svg:x="1.25cm" svg:y="7.4cm">
          <text:p/>
        </draw:rect>
        <draw:frame draw:style-name="gr20" draw:text-style-name="P88" draw:layer="layout" svg:width="6.5cm" svg:height="1.102cm" svg:x="1.85cm" svg:y="7.78cm">
          <draw:text-box>
            <text:p text:style-name="P87">Disponibilidad</text:p>
          </draw:text-box>
        </draw:frame>
        <draw:frame draw:style-name="gr20" draw:text-style-name="P84" draw:layer="layout" svg:width="14.2cm" svg:height="1.297cm" svg:x="8.3cm" svg:y="7.88cm">
          <draw:text-box>
            <text:p text:style-name="P83">Σⱼ≠ᵢ xᵢⱼ ≤ pᵢ</text:p>
          </draw:text-box>
        </draw:frame>
        <draw:frame draw:style-name="gr20" draw:text-style-name="P86" draw:layer="layout" svg:width="7.9cm" svg:height="1.077cm" svg:x="23.2cm" svg:y="7.8cm">
          <draw:text-box>
            <text:p text:style-name="P85">Nadie se utiliza dos veces</text:p>
          </draw:text-box>
        </draw:frame>
        <draw:rect draw:style-name="gr10" draw:text-style-name="P15" draw:layer="layout" svg:width="31cm" svg:height="2.8cm" svg:x="1.25cm" svg:y="10.9cm" draw:corner-radius="0.06cm">
          <text:p/>
        </draw:rect>
        <draw:rect draw:style-name="gr26" draw:text-style-name="P58" draw:layer="layout" svg:width="0.25cm" svg:height="2.8cm" svg:x="1.25cm" svg:y="10.9cm">
          <text:p/>
        </draw:rect>
        <draw:frame draw:style-name="gr20" draw:text-style-name="P90" draw:layer="layout" svg:width="6.5cm" svg:height="1.102cm" svg:x="1.85cm" svg:y="11.28cm">
          <draw:text-box>
            <text:p text:style-name="P89">Balance</text:p>
          </draw:text-box>
        </draw:frame>
        <draw:frame draw:style-name="gr20" draw:text-style-name="P84" draw:layer="layout" svg:width="14.2cm" svg:height="1.297cm" svg:x="8.3cm" svg:y="11.38cm">
          <draw:text-box>
            <text:p text:style-name="P83">yᵢ = pᵢ − salidas + llegadas</text:p>
          </draw:text-box>
        </draw:frame>
        <draw:frame draw:style-name="gr20" draw:text-style-name="P86" draw:layer="layout" svg:width="7.9cm" svg:height="1.077cm" svg:x="23.2cm" svg:y="11.3cm">
          <draw:text-box>
            <text:p text:style-name="P85">Σᵢ yᵢ = n</text:p>
          </draw:text-box>
        </draw:frame>
        <draw:rect draw:style-name="gr29" draw:text-style-name="P1" draw:layer="layout" svg:width="16cm" svg:height="0.62cm" svg:x="9.5cm" svg:y="14.5cm" draw:corner-radius="0.04cm">
          <text:p/>
        </draw:rect>
        <draw:frame draw:style-name="gr30" draw:text-style-name="P92" draw:layer="layout" svg:width="15.76cm" svg:height="0.977cm" svg:x="9.62cm" svg:y="14.605cm">
          <draw:text-box>
            <text:p text:style-name="P91">UNA PERSONA SE MUEVE COMO MÁXIMO UNA VEZ</text:p>
          </draw:text-box>
        </draw:frame>
        <presentation:notes draw:style-name="dp2">
          <draw:page-thumbnail draw:style-name="gr19" draw:layer="layout" svg:width="19.798cm" svg:height="11.136cm" svg:x="0.6cm" svg:y="2.257cm" draw:page-number="5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rect draw:style-name="gr1" draw:text-style-name="P1" draw:layer="layout" svg:width="33.867cm" svg:height="19.05cm" svg:x="0cm" svg:y="0cm">
          <text:p/>
        </draw:rect>
        <draw:rect draw:style-name="gr2" draw:text-style-name="P2" draw:layer="layout" svg:width="33.867cm" svg:height="0.17cm" svg:x="0cm" svg:y="0cm">
          <text:p/>
        </draw:rect>
        <draw:rect draw:style-name="gr17" draw:text-style-name="P28" draw:layer="layout" svg:width="33.867cm" svg:height="0.055cm" svg:x="0cm" svg:y="0.17cm">
          <text:p/>
        </draw:rect>
        <draw:frame draw:style-name="gr20" draw:text-style-name="P5" draw:layer="layout" svg:width="0.9cm" svg:height="1.077cm" svg:x="1.18cm" svg:y="18.16cm">
          <draw:text-box>
            <text:p text:style-name="P4">06</text:p>
          </draw:text-box>
        </draw:frame>
        <draw:frame draw:style-name="gr20" draw:text-style-name="P7" draw:layer="layout" svg:width="12cm" svg:height="1.077cm" svg:x="2.2cm" svg:y="18.16cm">
          <draw:text-box>
            <text:p text:style-name="P6">David Alejandro Enciso Gutierrez <text:s/>· <text:s/>3:45–4:30</text:p>
          </draw:text-box>
        </draw:frame>
        <draw:rect draw:style-name="gr5" draw:text-style-name="P8" draw:layer="layout" svg:width="5.6cm" svg:height="0.06cm" svg:x="26.9cm" svg:y="18.33cm">
          <text:p/>
        </draw:rect>
        <draw:rect draw:style-name="gr17" draw:text-style-name="P28" draw:layer="layout" svg:width="2.8cm" svg:height="0.06cm" svg:x="26.9cm" svg:y="18.33cm">
          <text:p/>
        </draw:rect>
        <draw:frame draw:style-name="gr20" draw:text-style-name="P25" draw:layer="layout" svg:width="7.2cm" svg:height="1.077cm" svg:x="1.25cm" svg:y="0.7cm">
          <draw:text-box>
            <text:p text:style-name="P24">2 · RESTRICCIONES Y OBJETIVO</text:p>
          </draw:text-box>
        </draw:frame>
        <draw:frame draw:style-name="gr20" draw:text-style-name="P33" draw:layer="layout" svg:width="31cm" svg:height="1.538cm" svg:x="1.18cm" svg:y="1.28cm">
          <draw:text-box>
            <text:p text:style-name="P32">Dos recursos distintos limitan la solución</text:p>
          </draw:text-box>
        </draw:frame>
        <draw:frame draw:style-name="gr20" draw:text-style-name="P35" draw:layer="layout" svg:width="30.5cm" svg:height="1.077cm" svg:x="1.25cm" svg:y="2.42cm">
          <draw:text-box>
            <text:p text:style-name="P34">El costo monetario no reemplaza la distancia total recorrida</text:p>
          </draw:text-box>
        </draw:frame>
        <draw:rect draw:style-name="gr5" draw:text-style-name="P8" draw:layer="layout" svg:width="31cm" svg:height="0.02cm" svg:x="1.25cm" svg:y="3.23cm">
          <text:p/>
        </draw:rect>
        <draw:rect draw:style-name="gr24" draw:text-style-name="P15" draw:layer="layout" svg:width="14.75cm" svg:height="7.2cm" svg:x="1.25cm" svg:y="4.1cm" draw:corner-radius="0.04cm">
          <text:p/>
        </draw:rect>
        <draw:rect draw:style-name="gr17" draw:text-style-name="P28" draw:layer="layout" svg:width="0.07cm" svg:height="7.2cm" svg:x="1.25cm" svg:y="4.1cm">
          <text:p/>
        </draw:rect>
        <draw:frame draw:style-name="gr20" draw:text-style-name="P53" draw:layer="layout" svg:width="14.1cm" svg:height="1.2cm" svg:x="1.61cm" svg:y="4.36cm">
          <draw:text-box>
            <text:p text:style-name="P52">PRESUPUESTO</text:p>
          </draw:text-box>
        </draw:frame>
        <draw:frame draw:style-name="gr20" draw:text-style-name="P51" draw:layer="layout" svg:width="14.1cm" svg:height="4.377cm" svg:x="1.61cm" svg:y="5.08cm">
          <draw:text-box>
            <text:p text:style-name="P50">Σᵢ Σⱼ≠ᵢ aᵢⱼ xᵢⱼ <text:s/>≤ <text:s/>ct</text:p>
            <text:p text:style-name="P50"/>
            <text:p text:style-name="P50">Incluye tamaño del grupo de origen</text:p>
            <text:p text:style-name="P50">y recargo del destino vacío.</text:p>
          </draw:text-box>
        </draw:frame>
        <draw:rect draw:style-name="gr24" draw:text-style-name="P15" draw:layer="layout" svg:width="15.5cm" svg:height="7.2cm" svg:x="16.75cm" svg:y="4.1cm" draw:corner-radius="0.04cm">
          <text:p/>
        </draw:rect>
        <draw:rect draw:style-name="gr26" draw:text-style-name="P58" draw:layer="layout" svg:width="0.07cm" svg:height="7.2cm" svg:x="16.75cm" svg:y="4.1cm">
          <text:p/>
        </draw:rect>
        <draw:frame draw:style-name="gr20" draw:text-style-name="P60" draw:layer="layout" svg:width="14.85cm" svg:height="1.2cm" svg:x="17.11cm" svg:y="4.36cm">
          <draw:text-box>
            <text:p text:style-name="P59">MOVIMIENTOS</text:p>
          </draw:text-box>
        </draw:frame>
        <draw:frame draw:style-name="gr20" draw:text-style-name="P51" draw:layer="layout" svg:width="14.85cm" svg:height="4.377cm" svg:x="17.11cm" svg:y="5.08cm">
          <draw:text-box>
            <text:p text:style-name="P50">Σᵢ Σⱼ≠ᵢ |j − i| xᵢⱼ <text:s/>≤ <text:s/>maxM</text:p>
            <text:p text:style-name="P50"/>
            <text:p text:style-name="P50">Cuenta posiciones recorridas,</text:p>
            <text:p text:style-name="P50">no solo personas trasladadas.</text:p>
          </draw:text-box>
        </draw:frame>
        <draw:rect draw:style-name="gr28" draw:text-style-name="P64" draw:layer="layout" svg:width="23.5cm" svg:height="2.4cm" svg:x="5.2cm" svg:y="12.4cm" draw:corner-radius="0.06cm">
          <text:p/>
        </draw:rect>
        <draw:frame draw:style-name="gr20" draw:text-style-name="P94" draw:layer="layout" svg:width="3cm" svg:height="1.077cm" svg:x="5.75cm" svg:y="12.85cm">
          <draw:text-box>
            <text:p text:style-name="P93">Ejemplo</text:p>
          </draw:text-box>
        </draw:frame>
        <draw:frame draw:style-name="gr20" draw:text-style-name="P96" draw:layer="layout" svg:width="19.3cm" svg:height="2.157cm" svg:x="8.4cm" svg:y="12.78cm">
          <draw:text-box>
            <text:p text:style-name="P95">2 personas de 4 → 1 <text:s/>consumen <text:s/>2 · |1−4| = 6 movimientos</text:p>
          </draw:text-box>
        </draw:frame>
        <presentation:notes draw:style-name="dp2">
          <draw:page-thumbnail draw:style-name="gr19" draw:layer="layout" svg:width="19.798cm" svg:height="11.136cm" svg:x="0.6cm" svg:y="2.257cm" draw:page-number="6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rect draw:style-name="gr1" draw:text-style-name="P1" draw:layer="layout" svg:width="33.867cm" svg:height="19.05cm" svg:x="0cm" svg:y="0cm">
          <text:p/>
        </draw:rect>
        <draw:rect draw:style-name="gr2" draw:text-style-name="P2" draw:layer="layout" svg:width="33.867cm" svg:height="0.17cm" svg:x="0cm" svg:y="0cm">
          <text:p/>
        </draw:rect>
        <draw:rect draw:style-name="gr17" draw:text-style-name="P28" draw:layer="layout" svg:width="33.867cm" svg:height="0.055cm" svg:x="0cm" svg:y="0.17cm">
          <text:p/>
        </draw:rect>
        <draw:frame draw:style-name="gr20" draw:text-style-name="P5" draw:layer="layout" svg:width="0.9cm" svg:height="1.077cm" svg:x="1.18cm" svg:y="18.16cm">
          <draw:text-box>
            <text:p text:style-name="P4">07</text:p>
          </draw:text-box>
        </draw:frame>
        <draw:frame draw:style-name="gr20" draw:text-style-name="P7" draw:layer="layout" svg:width="12cm" svg:height="1.077cm" svg:x="2.2cm" svg:y="18.16cm">
          <draw:text-box>
            <text:p text:style-name="P6">David Alejandro Enciso Gutierrez <text:s/>· <text:s/>4:30–5:20</text:p>
          </draw:text-box>
        </draw:frame>
        <draw:rect draw:style-name="gr5" draw:text-style-name="P8" draw:layer="layout" svg:width="5.6cm" svg:height="0.06cm" svg:x="26.9cm" svg:y="18.33cm">
          <text:p/>
        </draw:rect>
        <draw:rect draw:style-name="gr17" draw:text-style-name="P28" draw:layer="layout" svg:width="2.8cm" svg:height="0.06cm" svg:x="26.9cm" svg:y="18.33cm">
          <text:p/>
        </draw:rect>
        <draw:frame draw:style-name="gr20" draw:text-style-name="P25" draw:layer="layout" svg:width="7.2cm" svg:height="1.077cm" svg:x="1.25cm" svg:y="0.7cm">
          <draw:text-box>
            <text:p text:style-name="P24">2 · RESTRICCIONES Y OBJETIVO</text:p>
          </draw:text-box>
        </draw:frame>
        <draw:frame draw:style-name="gr20" draw:text-style-name="P33" draw:layer="layout" svg:width="31cm" svg:height="1.538cm" svg:x="1.18cm" svg:y="1.28cm">
          <draw:text-box>
            <text:p text:style-name="P32">La mediana entra al modelo sin volverlo no lineal</text:p>
          </draw:text-box>
        </draw:frame>
        <draw:frame draw:style-name="gr20" draw:text-style-name="P35" draw:layer="layout" svg:width="30.5cm" svg:height="1.077cm" svg:x="1.25cm" svg:y="2.42cm">
          <draw:text-box>
            <text:p text:style-name="P34">Una candidata activa; las auxiliares q conectan y con esa candidata</text:p>
          </draw:text-box>
        </draw:frame>
        <draw:rect draw:style-name="gr5" draw:text-style-name="P8" draw:layer="layout" svg:width="31cm" svg:height="0.02cm" svg:x="1.25cm" svg:y="3.23cm">
          <text:p/>
        </draw:rect>
        <draw:rect draw:style-name="gr24" draw:text-style-name="P15" draw:layer="layout" svg:width="9.1cm" svg:height="4cm" svg:x="1.25cm" svg:y="4.05cm" draw:corner-radius="0.04cm">
          <text:p/>
        </draw:rect>
        <draw:rect draw:style-name="gr17" draw:text-style-name="P28" draw:layer="layout" svg:width="0.07cm" svg:height="4cm" svg:x="1.25cm" svg:y="4.05cm">
          <text:p/>
        </draw:rect>
        <draw:frame draw:style-name="gr20" draw:text-style-name="P53" draw:layer="layout" svg:width="8.45cm" svg:height="1.2cm" svg:x="1.61cm" svg:y="4.31cm">
          <draw:text-box>
            <text:p text:style-name="P52">1 · SELECCIÓN</text:p>
          </draw:text-box>
        </draw:frame>
        <draw:frame draw:style-name="gr20" draw:text-style-name="P98" draw:layer="layout" svg:width="8.45cm" svg:height="3.985cm" svg:x="1.61cm" svg:y="5.03cm">
          <draw:text-box>
            <text:p text:style-name="P97">Σₖ zₖ = 1</text:p>
            <text:p text:style-name="P97"/>
            <text:p text:style-name="P97">Solo una candidata vₖ queda activa.</text:p>
          </draw:text-box>
        </draw:frame>
        <draw:rect draw:style-name="gr24" draw:text-style-name="P15" draw:layer="layout" svg:width="9.9cm" svg:height="4cm" svg:x="11.35cm" svg:y="4.05cm" draw:corner-radius="0.04cm">
          <text:p/>
        </draw:rect>
        <draw:rect draw:style-name="gr3" draw:text-style-name="P3" draw:layer="layout" svg:width="0.07cm" svg:height="4cm" svg:x="11.35cm" svg:y="4.05cm">
          <text:p/>
        </draw:rect>
        <draw:frame draw:style-name="gr20" draw:text-style-name="P55" draw:layer="layout" svg:width="9.25cm" svg:height="1.2cm" svg:x="11.71cm" svg:y="4.31cm">
          <draw:text-box>
            <text:p text:style-name="P54">2 · LINEALIZACIÓN</text:p>
          </draw:text-box>
        </draw:frame>
        <draw:frame draw:style-name="gr20" draw:text-style-name="P80" draw:layer="layout" svg:width="9.25cm" svg:height="2.871cm" svg:x="11.71cm" svg:y="5.03cm">
          <draw:text-box>
            <text:p text:style-name="P79">qᵢₖ ≤ yᵢ</text:p>
            <text:p text:style-name="P79">qᵢₖ ≤ nzₖ</text:p>
            <text:p text:style-name="P79">qᵢₖ ≥ yᵢ − n(1−zₖ)</text:p>
          </draw:text-box>
        </draw:frame>
        <draw:rect draw:style-name="gr24" draw:text-style-name="P15" draw:layer="layout" svg:width="10cm" svg:height="4cm" svg:x="22.25cm" svg:y="4.05cm" draw:corner-radius="0.04cm">
          <text:p/>
        </draw:rect>
        <draw:rect draw:style-name="gr25" draw:text-style-name="P47" draw:layer="layout" svg:width="0.07cm" svg:height="4cm" svg:x="22.25cm" svg:y="4.05cm">
          <text:p/>
        </draw:rect>
        <draw:frame draw:style-name="gr20" draw:text-style-name="P49" draw:layer="layout" svg:width="9.35cm" svg:height="1.2cm" svg:x="22.61cm" svg:y="4.31cm">
          <draw:text-box>
            <text:p text:style-name="P48">3 · EFECTO</text:p>
          </draw:text-box>
        </draw:frame>
        <draw:frame draw:style-name="gr20" draw:text-style-name="P98" draw:layer="layout" svg:width="9.35cm" svg:height="2.063cm" svg:x="22.61cm" svg:y="5.03cm">
          <draw:text-box>
            <text:p text:style-name="P97">zₖ = 0 <text:s/>⇒ <text:s/>qᵢₖ = 0</text:p>
            <text:p text:style-name="P97">zₖ = 1 <text:s/>⇒ <text:s/>qᵢₖ = yᵢ</text:p>
          </draw:text-box>
        </draw:frame>
        <draw:rect draw:style-name="gr28" draw:text-style-name="P64" draw:layer="layout" svg:width="31cm" svg:height="3.8cm" svg:x="1.25cm" svg:y="9.2cm" draw:corner-radius="0.06cm">
          <text:p/>
        </draw:rect>
        <draw:frame draw:style-name="gr20" draw:text-style-name="P46" draw:layer="layout" svg:width="6.8cm" svg:height="1.077cm" svg:x="1.9cm" svg:y="9.65cm">
          <draw:text-box>
            <text:p text:style-name="P45">FUNCIÓN OBJETIVO</text:p>
          </draw:text-box>
        </draw:frame>
        <draw:frame draw:style-name="gr20" draw:text-style-name="P100" draw:layer="layout" svg:width="23cm" svg:height="1.58cm" svg:x="7.6cm" svg:y="10cm">
          <draw:text-box>
            <text:p text:style-name="P99">min <text:s/>P = Σᵢ Σₖ |vᵢ − vₖ| · qᵢₖ</text:p>
          </draw:text-box>
        </draw:frame>
        <draw:frame draw:style-name="gr20" draw:text-style-name="P23" draw:layer="layout" svg:width="23.5cm" svg:height="1.077cm" svg:x="5.6cm" svg:y="11.6cm">
          <draw:text-box>
            <text:p text:style-name="P22">Minimizar desviaciones absolutas selecciona una mediana ponderada.</text:p>
          </draw:text-box>
        </draw:frame>
        <presentation:notes draw:style-name="dp2">
          <draw:page-thumbnail draw:style-name="gr19" draw:layer="layout" svg:width="19.798cm" svg:height="11.136cm" svg:x="0.6cm" svg:y="2.257cm" draw:page-number="7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rect draw:style-name="gr1" draw:text-style-name="P1" draw:layer="layout" svg:width="33.867cm" svg:height="19.05cm" svg:x="0cm" svg:y="0cm">
          <text:p/>
        </draw:rect>
        <draw:rect draw:style-name="gr2" draw:text-style-name="P2" draw:layer="layout" svg:width="33.867cm" svg:height="0.17cm" svg:x="0cm" svg:y="0cm">
          <text:p/>
        </draw:rect>
        <draw:rect draw:style-name="gr17" draw:text-style-name="P28" draw:layer="layout" svg:width="33.867cm" svg:height="0.055cm" svg:x="0cm" svg:y="0.17cm">
          <text:p/>
        </draw:rect>
        <draw:frame draw:style-name="gr20" draw:text-style-name="P5" draw:layer="layout" svg:width="0.9cm" svg:height="1.077cm" svg:x="1.18cm" svg:y="18.16cm">
          <draw:text-box>
            <text:p text:style-name="P4">08</text:p>
          </draw:text-box>
        </draw:frame>
        <draw:frame draw:style-name="gr20" draw:text-style-name="P7" draw:layer="layout" svg:width="12cm" svg:height="1.077cm" svg:x="2.2cm" svg:y="18.16cm">
          <draw:text-box>
            <text:p text:style-name="P6">David Alejandro Enciso Gutierrez <text:s/>· <text:s/>5:20–6:00</text:p>
          </draw:text-box>
        </draw:frame>
        <draw:rect draw:style-name="gr5" draw:text-style-name="P8" draw:layer="layout" svg:width="5.6cm" svg:height="0.06cm" svg:x="26.9cm" svg:y="18.33cm">
          <text:p/>
        </draw:rect>
        <draw:rect draw:style-name="gr17" draw:text-style-name="P28" draw:layer="layout" svg:width="2.8cm" svg:height="0.06cm" svg:x="26.9cm" svg:y="18.33cm">
          <text:p/>
        </draw:rect>
        <draw:frame draw:style-name="gr20" draw:text-style-name="P25" draw:layer="layout" svg:width="7.2cm" svg:height="1.077cm" svg:x="1.25cm" svg:y="0.7cm">
          <draw:text-box>
            <text:p text:style-name="P24">2 · RESTRICCIONES Y OBJETIVO</text:p>
          </draw:text-box>
        </draw:frame>
        <draw:frame draw:style-name="gr20" draw:text-style-name="P33" draw:layer="layout" svg:width="31cm" svg:height="1.538cm" svg:x="1.18cm" svg:y="1.28cm">
          <draw:text-box>
            <text:p text:style-name="P32">De un archivo MPL a un óptimo verificable</text:p>
          </draw:text-box>
        </draw:frame>
        <draw:frame draw:style-name="gr20" draw:text-style-name="P35" draw:layer="layout" svg:width="30.5cm" svg:height="1.077cm" svg:x="1.25cm" svg:y="2.42cm">
          <draw:text-box>
            <text:p text:style-name="P34">La transformación conserva exactamente los decimales de entrada</text:p>
          </draw:text-box>
        </draw:frame>
        <draw:rect draw:style-name="gr5" draw:text-style-name="P8" draw:layer="layout" svg:width="31cm" svg:height="0.02cm" svg:x="1.25cm" svg:y="3.23cm">
          <text:p/>
        </draw:rect>
        <draw:rect draw:style-name="gr10" draw:text-style-name="P15" draw:layer="layout" svg:width="4.5cm" svg:height="2.9cm" svg:x="1.1cm" svg:y="4.5cm" draw:corner-radius="0.06cm">
          <text:p/>
        </draw:rect>
        <draw:frame draw:style-name="gr30" draw:text-style-name="P102" draw:layer="layout" svg:width="4.18cm" svg:height="1.002cm" svg:x="1.26cm" svg:y="4.92cm">
          <draw:text-box>
            <text:p text:style-name="P101">.mpl</text:p>
          </draw:text-box>
        </draw:frame>
        <draw:frame draw:style-name="gr20" draw:text-style-name="P104" draw:layer="layout" svg:width="4.1cm" svg:height="1.077cm" svg:x="1.3cm" svg:y="5.95cm">
          <draw:text-box>
            <text:p text:style-name="P103">entrada</text:p>
          </draw:text-box>
        </draw:frame>
        <draw:line draw:style-name="gr21" draw:text-style-name="P40" draw:layer="layout" svg:x1="5.62cm" svg:y1="5.94cm" svg:x2="6.22cm" svg:y2="5.94cm">
          <text:p/>
        </draw:line>
        <draw:rect draw:style-name="gr10" draw:text-style-name="P15" draw:layer="layout" svg:width="4.5cm" svg:height="2.9cm" svg:x="6.35cm" svg:y="4.5cm" draw:corner-radius="0.06cm">
          <text:p/>
        </draw:rect>
        <draw:frame draw:style-name="gr30" draw:text-style-name="P106" draw:layer="layout" svg:width="4.18cm" svg:height="1.002cm" svg:x="6.51cm" svg:y="4.92cm">
          <draw:text-box>
            <text:p text:style-name="P105">validar</text:p>
          </draw:text-box>
        </draw:frame>
        <draw:frame draw:style-name="gr20" draw:text-style-name="P104" draw:layer="layout" svg:width="4.1cm" svg:height="1.077cm" svg:x="6.55cm" svg:y="5.95cm">
          <draw:text-box>
            <text:p text:style-name="P103">+ escalar</text:p>
          </draw:text-box>
        </draw:frame>
        <draw:line draw:style-name="gr22" draw:text-style-name="P40" draw:layer="layout" svg:x1="10.87cm" svg:y1="5.94cm" svg:x2="11.47cm" svg:y2="5.94cm">
          <text:p/>
        </draw:line>
        <draw:rect draw:style-name="gr10" draw:text-style-name="P15" draw:layer="layout" svg:width="4.5cm" svg:height="2.9cm" svg:x="11.6cm" svg:y="4.5cm" draw:corner-radius="0.06cm">
          <text:p/>
        </draw:rect>
        <draw:frame draw:style-name="gr30" draw:text-style-name="P108" draw:layer="layout" svg:width="4.18cm" svg:height="1.002cm" svg:x="11.76cm" svg:y="4.92cm">
          <draw:text-box>
            <text:p text:style-name="P107">.dzn</text:p>
          </draw:text-box>
        </draw:frame>
        <draw:frame draw:style-name="gr20" draw:text-style-name="P104" draw:layer="layout" svg:width="4.1cm" svg:height="1.077cm" svg:x="11.8cm" svg:y="5.95cm">
          <draw:text-box>
            <text:p text:style-name="P103">enteros</text:p>
          </draw:text-box>
        </draw:frame>
        <draw:line draw:style-name="gr23" draw:text-style-name="P40" draw:layer="layout" svg:x1="16.12cm" svg:y1="5.94cm" svg:x2="16.72cm" svg:y2="5.94cm">
          <text:p/>
        </draw:line>
        <draw:rect draw:style-name="gr10" draw:text-style-name="P15" draw:layer="layout" svg:width="4.5cm" svg:height="2.9cm" svg:x="16.85cm" svg:y="4.5cm" draw:corner-radius="0.06cm">
          <text:p/>
        </draw:rect>
        <draw:frame draw:style-name="gr30" draw:text-style-name="P110" draw:layer="layout" svg:width="4.18cm" svg:height="0.977cm" svg:x="17.01cm" svg:y="4.92cm">
          <draw:text-box>
            <text:p text:style-name="P109">Proyecto.mzn</text:p>
          </draw:text-box>
        </draw:frame>
        <draw:frame draw:style-name="gr20" draw:text-style-name="P104" draw:layer="layout" svg:width="4.1cm" svg:height="1.077cm" svg:x="17.05cm" svg:y="5.95cm">
          <draw:text-box>
            <text:p text:style-name="P103">IP/PLE</text:p>
          </draw:text-box>
        </draw:frame>
        <draw:line draw:style-name="gr21" draw:text-style-name="P40" draw:layer="layout" svg:x1="21.37cm" svg:y1="5.94cm" svg:x2="21.97cm" svg:y2="5.94cm">
          <text:p/>
        </draw:line>
        <draw:rect draw:style-name="gr10" draw:text-style-name="P15" draw:layer="layout" svg:width="4.5cm" svg:height="2.9cm" svg:x="22.1cm" svg:y="4.5cm" draw:corner-radius="0.06cm">
          <text:p/>
        </draw:rect>
        <draw:frame draw:style-name="gr30" draw:text-style-name="P112" draw:layer="layout" svg:width="4.18cm" svg:height="1.002cm" svg:x="22.26cm" svg:y="4.92cm">
          <draw:text-box>
            <text:p text:style-name="P111">solver</text:p>
          </draw:text-box>
        </draw:frame>
        <draw:frame draw:style-name="gr20" draw:text-style-name="P104" draw:layer="layout" svg:width="4.1cm" svg:height="1.589cm" svg:x="22.3cm" svg:y="5.95cm">
          <draw:text-box>
            <text:p text:style-name="P103">ramificación + poda</text:p>
          </draw:text-box>
        </draw:frame>
        <draw:line draw:style-name="gr31" draw:text-style-name="P40" draw:layer="layout" svg:x1="26.62cm" svg:y1="5.94cm" svg:x2="27.22cm" svg:y2="5.94cm">
          <text:p/>
        </draw:line>
        <draw:rect draw:style-name="gr10" draw:text-style-name="P15" draw:layer="layout" svg:width="4.5cm" svg:height="2.9cm" svg:x="27.35cm" svg:y="4.5cm" draw:corner-radius="0.06cm">
          <text:p/>
        </draw:rect>
        <draw:frame draw:style-name="gr30" draw:text-style-name="P106" draw:layer="layout" svg:width="4.18cm" svg:height="1.002cm" svg:x="27.51cm" svg:y="4.92cm">
          <draw:text-box>
            <text:p text:style-name="P105">resultado</text:p>
          </draw:text-box>
        </draw:frame>
        <draw:frame draw:style-name="gr20" draw:text-style-name="P104" draw:layer="layout" svg:width="4.1cm" svg:height="1.077cm" svg:x="27.55cm" svg:y="5.95cm">
          <draw:text-box>
            <text:p text:style-name="P103">+ 7 checks</text:p>
          </draw:text-box>
        </draw:frame>
        <draw:rect draw:style-name="gr24" draw:text-style-name="P15" draw:layer="layout" svg:width="14.6cm" svg:height="4.3cm" svg:x="1.25cm" svg:y="8.5cm" draw:corner-radius="0.04cm">
          <text:p/>
        </draw:rect>
        <draw:rect draw:style-name="gr3" draw:text-style-name="P3" draw:layer="layout" svg:width="0.07cm" svg:height="4.3cm" svg:x="1.25cm" svg:y="8.5cm">
          <text:p/>
        </draw:rect>
        <draw:frame draw:style-name="gr20" draw:text-style-name="P55" draw:layer="layout" svg:width="13.95cm" svg:height="1.2cm" svg:x="1.61cm" svg:y="8.76cm">
          <draw:text-box>
            <text:p text:style-name="P54">ESCALAMIENTO</text:p>
          </draw:text-box>
        </draw:frame>
        <draw:frame draw:style-name="gr20" draw:text-style-name="P98" draw:layer="layout" svg:width="13.95cm" svg:height="3.024cm" svg:x="1.61cm" svg:y="9.48cm">
          <draw:text-box>
            <text:p text:style-name="P97">Vᵢ = Sᵥvᵢ <text:s/>· <text:s/>Cᵢⱼ = Sccᵢⱼ</text:p>
            <text:p text:style-name="P97">La división por n se elimina algebraicamente.</text:p>
          </draw:text-box>
        </draw:frame>
        <draw:rect draw:style-name="gr24" draw:text-style-name="P15" draw:layer="layout" svg:width="15.65cm" svg:height="4.3cm" svg:x="16.6cm" svg:y="8.5cm" draw:corner-radius="0.04cm">
          <text:p/>
        </draw:rect>
        <draw:rect draw:style-name="gr25" draw:text-style-name="P47" draw:layer="layout" svg:width="0.07cm" svg:height="4.3cm" svg:x="16.6cm" svg:y="8.5cm">
          <text:p/>
        </draw:rect>
        <draw:frame draw:style-name="gr20" draw:text-style-name="P49" draw:layer="layout" svg:width="15cm" svg:height="1.2cm" svg:x="16.96cm" svg:y="8.76cm">
          <draw:text-box>
            <text:p text:style-name="P48">CERTIFICADO DE ÓPTIMO</text:p>
          </draw:text-box>
        </draw:frame>
        <draw:frame draw:style-name="gr20" draw:text-style-name="P80" draw:layer="layout" svg:width="15cm" svg:height="2.871cm" svg:x="16.96cm" svg:y="9.48cm">
          <draw:text-box>
            <text:p text:style-name="P79">Relajación lineal → LB</text:p>
            <text:p text:style-name="P79">Incumbente entero → UB</text:p>
            <text:p text:style-name="P79">LB = UB <text:s/>⇒ <text:s/>brecha 0 %</text:p>
          </draw:text-box>
        </draw:frame>
        <presentation:notes draw:style-name="dp2">
          <draw:page-thumbnail draw:style-name="gr19" draw:layer="layout" svg:width="19.798cm" svg:height="11.136cm" svg:x="0.6cm" svg:y="2.257cm" draw:page-number="8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rect draw:style-name="gr1" draw:text-style-name="P1" draw:layer="layout" svg:width="33.867cm" svg:height="19.05cm" svg:x="0cm" svg:y="0cm">
          <text:p/>
        </draw:rect>
        <draw:rect draw:style-name="gr2" draw:text-style-name="P2" draw:layer="layout" svg:width="33.867cm" svg:height="0.17cm" svg:x="0cm" svg:y="0cm">
          <text:p/>
        </draw:rect>
        <draw:rect draw:style-name="gr26" draw:text-style-name="P58" draw:layer="layout" svg:width="33.867cm" svg:height="0.055cm" svg:x="0cm" svg:y="0.17cm">
          <text:p/>
        </draw:rect>
        <draw:frame draw:style-name="gr20" draw:text-style-name="P5" draw:layer="layout" svg:width="0.9cm" svg:height="1.077cm" svg:x="1.18cm" svg:y="18.16cm">
          <draw:text-box>
            <text:p text:style-name="P4">09</text:p>
          </draw:text-box>
        </draw:frame>
        <draw:frame draw:style-name="gr20" draw:text-style-name="P7" draw:layer="layout" svg:width="12cm" svg:height="1.077cm" svg:x="2.2cm" svg:y="18.16cm">
          <draw:text-box>
            <text:p text:style-name="P6">Juan Esteban Rodriguez Valencia <text:s/>· <text:s/>6:00–6:35</text:p>
          </draw:text-box>
        </draw:frame>
        <draw:rect draw:style-name="gr5" draw:text-style-name="P8" draw:layer="layout" svg:width="5.6cm" svg:height="0.06cm" svg:x="26.9cm" svg:y="18.33cm">
          <text:p/>
        </draw:rect>
        <draw:rect draw:style-name="gr26" draw:text-style-name="P58" draw:layer="layout" svg:width="4.2cm" svg:height="0.06cm" svg:x="26.9cm" svg:y="18.33cm">
          <text:p/>
        </draw:rect>
        <draw:frame draw:style-name="gr20" draw:text-style-name="P25" draw:layer="layout" svg:width="7.2cm" svg:height="1.077cm" svg:x="1.25cm" svg:y="0.7cm">
          <draw:text-box>
            <text:p text:style-name="P24">3 · RESULTADOS Y ANÁLISIS</text:p>
          </draw:text-box>
        </draw:frame>
        <draw:frame draw:style-name="gr20" draw:text-style-name="P33" draw:layer="layout" svg:width="31cm" svg:height="1.538cm" svg:x="1.18cm" svg:y="1.28cm">
          <draw:text-box>
            <text:p text:style-name="P32">La solución se comprueba desde varias capas</text:p>
          </draw:text-box>
        </draw:frame>
        <draw:frame draw:style-name="gr20" draw:text-style-name="P35" draw:layer="layout" svg:width="30.5cm" svg:height="1.077cm" svg:x="1.25cm" svg:y="2.42cm">
          <draw:text-box>
            <text:p text:style-name="P34">El verificador independiente no confía en las etiquetas del solver</text:p>
          </draw:text-box>
        </draw:frame>
        <draw:rect draw:style-name="gr5" draw:text-style-name="P8" draw:layer="layout" svg:width="31cm" svg:height="0.02cm" svg:x="1.25cm" svg:y="3.23cm">
          <text:p/>
        </draw:rect>
        <draw:rect draw:style-name="gr24" draw:text-style-name="P15" draw:layer="layout" svg:width="7.3cm" svg:height="1.85cm" svg:x="1.25cm" svg:y="3.9cm" draw:corner-radius="0.04cm">
          <text:p/>
        </draw:rect>
        <draw:frame draw:style-name="gr20" draw:text-style-name="P114" draw:layer="layout" svg:width="7.1cm" svg:height="1.394cm" svg:x="1.35cm" svg:y="4.08cm">
          <draw:text-box>
            <text:p text:style-name="P113">6</text:p>
          </draw:text-box>
        </draw:frame>
        <draw:frame draw:style-name="gr20" draw:text-style-name="P116" draw:layer="layout" svg:width="7.1cm" svg:height="1.077cm" svg:x="1.35cm" svg:y="5.07cm">
          <draw:text-box>
            <text:p text:style-name="P115">instancias principales</text:p>
          </draw:text-box>
        </draw:frame>
        <draw:rect draw:style-name="gr24" draw:text-style-name="P15" draw:layer="layout" svg:width="7.3cm" svg:height="1.85cm" svg:x="9.15cm" svg:y="3.9cm" draw:corner-radius="0.04cm">
          <text:p/>
        </draw:rect>
        <draw:frame draw:style-name="gr20" draw:text-style-name="P118" draw:layer="layout" svg:width="7.1cm" svg:height="1.394cm" svg:x="9.25cm" svg:y="4.08cm">
          <draw:text-box>
            <text:p text:style-name="P117">4</text:p>
          </draw:text-box>
        </draw:frame>
        <draw:frame draw:style-name="gr20" draw:text-style-name="P116" draw:layer="layout" svg:width="7.1cm" svg:height="1.077cm" svg:x="9.25cm" svg:y="5.07cm">
          <draw:text-box>
            <text:p text:style-name="P115">variaciones controladas</text:p>
          </draw:text-box>
        </draw:frame>
        <draw:rect draw:style-name="gr24" draw:text-style-name="P15" draw:layer="layout" svg:width="7.3cm" svg:height="1.85cm" svg:x="17.05cm" svg:y="3.9cm" draw:corner-radius="0.04cm">
          <text:p/>
        </draw:rect>
        <draw:frame draw:style-name="gr20" draw:text-style-name="P120" draw:layer="layout" svg:width="7.1cm" svg:height="1.394cm" svg:x="17.15cm" svg:y="4.08cm">
          <draw:text-box>
            <text:p text:style-name="P119">30</text:p>
          </draw:text-box>
        </draw:frame>
        <draw:frame draw:style-name="gr20" draw:text-style-name="P116" draw:layer="layout" svg:width="7.1cm" svg:height="1.077cm" svg:x="17.15cm" svg:y="5.07cm">
          <draw:text-box>
            <text:p text:style-name="P115">entradas suministradas</text:p>
          </draw:text-box>
        </draw:frame>
        <draw:rect draw:style-name="gr24" draw:text-style-name="P15" draw:layer="layout" svg:width="7.3cm" svg:height="1.85cm" svg:x="24.95cm" svg:y="3.9cm" draw:corner-radius="0.04cm">
          <text:p/>
        </draw:rect>
        <draw:frame draw:style-name="gr20" draw:text-style-name="P122" draw:layer="layout" svg:width="7.1cm" svg:height="1.394cm" svg:x="25.05cm" svg:y="4.08cm">
          <draw:text-box>
            <text:p text:style-name="P121">100 %</text:p>
          </draw:text-box>
        </draw:frame>
        <draw:frame draw:style-name="gr20" draw:text-style-name="P116" draw:layer="layout" svg:width="7.1cm" svg:height="1.077cm" svg:x="25.05cm" svg:y="5.07cm">
          <draw:text-box>
            <text:p text:style-name="P115">con estado óptimo</text:p>
          </draw:text-box>
        </draw:frame>
        <draw:rect draw:style-name="gr10" draw:text-style-name="P15" draw:layer="layout" svg:width="31cm" svg:height="6.6cm" svg:x="1.25cm" svg:y="6.7cm" draw:corner-radius="0.06cm">
          <text:p/>
        </draw:rect>
        <draw:frame draw:style-name="gr20" draw:text-style-name="P124" draw:layer="layout" svg:width="10cm" svg:height="1.077cm" svg:x="1.9cm" svg:y="7.2cm">
          <draw:text-box>
            <text:p text:style-name="P123">VERIFICACIÓN INDEPENDIENTE</text:p>
          </draw:text-box>
        </draw:frame>
        <draw:frame draw:style-name="gr30" draw:text-style-name="P126" draw:layer="layout" svg:width="1.3cm" svg:height="0.977cm" svg:x="1.9cm" svg:y="8.4cm">
          <draw:text-box>
            <text:p text:style-name="P125">OK</text:p>
          </draw:text-box>
        </draw:frame>
        <draw:frame draw:style-name="gr20" draw:text-style-name="P128" draw:layer="layout" svg:width="12.05cm" svg:height="1.077cm" svg:x="3.35cm" svg:y="8.4cm">
          <draw:text-box>
            <text:p text:style-name="P127">dominio y diagonal</text:p>
          </draw:text-box>
        </draw:frame>
        <draw:frame draw:style-name="gr30" draw:text-style-name="P126" draw:layer="layout" svg:width="1.3cm" svg:height="0.977cm" svg:x="16.9cm" svg:y="8.4cm">
          <draw:text-box>
            <text:p text:style-name="P125">OK</text:p>
          </draw:text-box>
        </draw:frame>
        <draw:frame draw:style-name="gr20" draw:text-style-name="P128" draw:layer="layout" svg:width="12.05cm" svg:height="1.077cm" svg:x="18.35cm" svg:y="8.4cm">
          <draw:text-box>
            <text:p text:style-name="P127">disponibilidad por origen</text:p>
          </draw:text-box>
        </draw:frame>
        <draw:frame draw:style-name="gr30" draw:text-style-name="P126" draw:layer="layout" svg:width="1.3cm" svg:height="0.977cm" svg:x="1.9cm" svg:y="9.7cm">
          <draw:text-box>
            <text:p text:style-name="P125">OK</text:p>
          </draw:text-box>
        </draw:frame>
        <draw:frame draw:style-name="gr20" draw:text-style-name="P128" draw:layer="layout" svg:width="12.05cm" svg:height="1.077cm" svg:x="3.35cm" svg:y="9.7cm">
          <draw:text-box>
            <text:p text:style-name="P127">balance y conservación</text:p>
          </draw:text-box>
        </draw:frame>
        <draw:frame draw:style-name="gr30" draw:text-style-name="P126" draw:layer="layout" svg:width="1.3cm" svg:height="0.977cm" svg:x="16.9cm" svg:y="9.7cm">
          <draw:text-box>
            <text:p text:style-name="P125">OK</text:p>
          </draw:text-box>
        </draw:frame>
        <draw:frame draw:style-name="gr20" draw:text-style-name="P128" draw:layer="layout" svg:width="12.05cm" svg:height="1.077cm" svg:x="18.35cm" svg:y="9.7cm">
          <draw:text-box>
            <text:p text:style-name="P127">costo y presupuesto</text:p>
          </draw:text-box>
        </draw:frame>
        <draw:frame draw:style-name="gr30" draw:text-style-name="P126" draw:layer="layout" svg:width="1.3cm" svg:height="0.977cm" svg:x="1.9cm" svg:y="11cm">
          <draw:text-box>
            <text:p text:style-name="P125">OK</text:p>
          </draw:text-box>
        </draw:frame>
        <draw:frame draw:style-name="gr20" draw:text-style-name="P128" draw:layer="layout" svg:width="12.05cm" svg:height="1.077cm" svg:x="3.35cm" svg:y="11cm">
          <draw:text-box>
            <text:p text:style-name="P127">distancia ≤ maxM</text:p>
          </draw:text-box>
        </draw:frame>
        <draw:frame draw:style-name="gr30" draw:text-style-name="P126" draw:layer="layout" svg:width="1.3cm" svg:height="0.977cm" svg:x="16.9cm" svg:y="11cm">
          <draw:text-box>
            <text:p text:style-name="P125">OK</text:p>
          </draw:text-box>
        </draw:frame>
        <draw:frame draw:style-name="gr20" draw:text-style-name="P128" draw:layer="layout" svg:width="12.05cm" svg:height="1.077cm" svg:x="18.35cm" svg:y="11cm">
          <draw:text-box>
            <text:p text:style-name="P127">mediana y polarización</text:p>
          </draw:text-box>
        </draw:frame>
        <draw:rect draw:style-name="gr32" draw:text-style-name="P1" draw:layer="layout" svg:width="16.5cm" svg:height="0.62cm" svg:x="9cm" svg:y="14.1cm" draw:corner-radius="0.04cm">
          <text:p/>
        </draw:rect>
        <draw:frame draw:style-name="gr30" draw:text-style-name="P130" draw:layer="layout" svg:width="16.26cm" svg:height="0.977cm" svg:x="9.12cm" svg:y="14.205cm">
          <draw:text-box>
            <text:p text:style-name="P129">10 PRUEBAS DE INTEGRACIÓN · 8 UNITARIAS</text:p>
          </draw:text-box>
        </draw:frame>
        <presentation:notes draw:style-name="dp2">
          <draw:page-thumbnail draw:style-name="gr19" draw:layer="layout" svg:width="19.798cm" svg:height="11.136cm" svg:x="0.6cm" svg:y="2.257cm" draw:page-number="9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rect draw:style-name="gr1" draw:text-style-name="P1" draw:layer="layout" svg:width="33.867cm" svg:height="19.05cm" svg:x="0cm" svg:y="0cm">
          <text:p/>
        </draw:rect>
        <draw:rect draw:style-name="gr2" draw:text-style-name="P2" draw:layer="layout" svg:width="33.867cm" svg:height="0.17cm" svg:x="0cm" svg:y="0cm">
          <text:p/>
        </draw:rect>
        <draw:rect draw:style-name="gr26" draw:text-style-name="P58" draw:layer="layout" svg:width="33.867cm" svg:height="0.055cm" svg:x="0cm" svg:y="0.17cm">
          <text:p/>
        </draw:rect>
        <draw:frame draw:style-name="gr20" draw:text-style-name="P5" draw:layer="layout" svg:width="0.9cm" svg:height="1.077cm" svg:x="1.18cm" svg:y="18.16cm">
          <draw:text-box>
            <text:p text:style-name="P4">10</text:p>
          </draw:text-box>
        </draw:frame>
        <draw:frame draw:style-name="gr20" draw:text-style-name="P7" draw:layer="layout" svg:width="12cm" svg:height="1.077cm" svg:x="2.2cm" svg:y="18.16cm">
          <draw:text-box>
            <text:p text:style-name="P6">Juan Esteban Rodriguez Valencia <text:s/>· <text:s/>6:35–7:20</text:p>
          </draw:text-box>
        </draw:frame>
        <draw:rect draw:style-name="gr5" draw:text-style-name="P8" draw:layer="layout" svg:width="5.6cm" svg:height="0.06cm" svg:x="26.9cm" svg:y="18.33cm">
          <text:p/>
        </draw:rect>
        <draw:rect draw:style-name="gr26" draw:text-style-name="P58" draw:layer="layout" svg:width="4.2cm" svg:height="0.06cm" svg:x="26.9cm" svg:y="18.33cm">
          <text:p/>
        </draw:rect>
        <draw:frame draw:style-name="gr20" draw:text-style-name="P25" draw:layer="layout" svg:width="7.2cm" svg:height="1.077cm" svg:x="1.25cm" svg:y="0.7cm">
          <draw:text-box>
            <text:p text:style-name="P24">3 · RESULTADOS Y ANÁLISIS</text:p>
          </draw:text-box>
        </draw:frame>
        <draw:frame draw:style-name="gr20" draw:text-style-name="P33" draw:layer="layout" svg:width="31cm" svg:height="1.538cm" svg:x="1.18cm" svg:y="1.28cm">
          <draw:text-box>
            <text:p text:style-name="P32">Seis instancias, seis óptimos certificados</text:p>
          </draw:text-box>
        </draw:frame>
        <draw:frame draw:style-name="gr20" draw:text-style-name="P35" draw:layer="layout" svg:width="30.5cm" svg:height="1.077cm" svg:x="1.25cm" svg:y="2.42cm">
          <draw:text-box>
            <text:p text:style-name="P34">MiniZinc 2.9.7 · HiGHS 1.14.0 · tiempos puntuales del solver</text:p>
          </draw:text-box>
        </draw:frame>
        <draw:rect draw:style-name="gr5" draw:text-style-name="P8" draw:layer="layout" svg:width="31cm" svg:height="0.02cm" svg:x="1.25cm" svg:y="3.23cm">
          <text:p/>
        </draw:rect>
        <draw:rect draw:style-name="gr33" draw:text-style-name="P131" draw:layer="layout" svg:width="8.2cm" svg:height="1.55cm" svg:x="1.25cm" svg:y="3.9cm">
          <text:p/>
        </draw:rect>
        <draw:frame draw:style-name="gr20" draw:text-style-name="P133" draw:layer="layout" svg:width="8.08cm" svg:height="1.077cm" svg:x="1.31cm" svg:y="4.32cm">
          <draw:text-box>
            <text:p text:style-name="P132">Instancia</text:p>
          </draw:text-box>
        </draw:frame>
        <draw:rect draw:style-name="gr33" draw:text-style-name="P131" draw:layer="layout" svg:width="2.5cm" svg:height="1.55cm" svg:x="9.45cm" svg:y="3.9cm">
          <text:p/>
        </draw:rect>
        <draw:frame draw:style-name="gr20" draw:text-style-name="P133" draw:layer="layout" svg:width="2.38cm" svg:height="1.077cm" svg:x="9.51cm" svg:y="4.32cm">
          <draw:text-box>
            <text:p text:style-name="P132">n</text:p>
          </draw:text-box>
        </draw:frame>
        <draw:rect draw:style-name="gr33" draw:text-style-name="P131" draw:layer="layout" svg:width="2.5cm" svg:height="1.55cm" svg:x="11.95cm" svg:y="3.9cm">
          <text:p/>
        </draw:rect>
        <draw:frame draw:style-name="gr20" draw:text-style-name="P133" draw:layer="layout" svg:width="2.38cm" svg:height="1.077cm" svg:x="12.01cm" svg:y="4.32cm">
          <draw:text-box>
            <text:p text:style-name="P132">m</text:p>
          </draw:text-box>
        </draw:frame>
        <draw:rect draw:style-name="gr33" draw:text-style-name="P131" draw:layer="layout" svg:width="4.2cm" svg:height="1.55cm" svg:x="14.45cm" svg:y="3.9cm">
          <text:p/>
        </draw:rect>
        <draw:frame draw:style-name="gr20" draw:text-style-name="P133" draw:layer="layout" svg:width="4.08cm" svg:height="1.077cm" svg:x="14.51cm" svg:y="4.32cm">
          <draw:text-box>
            <text:p text:style-name="P132">Costo</text:p>
          </draw:text-box>
        </draw:frame>
        <draw:rect draw:style-name="gr33" draw:text-style-name="P131" draw:layer="layout" svg:width="3.5cm" svg:height="1.55cm" svg:x="18.65cm" svg:y="3.9cm">
          <text:p/>
        </draw:rect>
        <draw:frame draw:style-name="gr20" draw:text-style-name="P133" draw:layer="layout" svg:width="3.38cm" svg:height="1.077cm" svg:x="18.71cm" svg:y="4.32cm">
          <draw:text-box>
            <text:p text:style-name="P132">Movs.</text:p>
          </draw:text-box>
        </draw:frame>
        <draw:rect draw:style-name="gr33" draw:text-style-name="P131" draw:layer="layout" svg:width="3.3cm" svg:height="1.55cm" svg:x="22.15cm" svg:y="3.9cm">
          <text:p/>
        </draw:rect>
        <draw:frame draw:style-name="gr20" draw:text-style-name="P133" draw:layer="layout" svg:width="3.18cm" svg:height="1.077cm" svg:x="22.21cm" svg:y="4.32cm">
          <draw:text-box>
            <text:p text:style-name="P132">Pol.</text:p>
          </draw:text-box>
        </draw:frame>
        <draw:rect draw:style-name="gr33" draw:text-style-name="P131" draw:layer="layout" svg:width="3.5cm" svg:height="1.55cm" svg:x="25.45cm" svg:y="3.9cm">
          <text:p/>
        </draw:rect>
        <draw:frame draw:style-name="gr20" draw:text-style-name="P133" draw:layer="layout" svg:width="3.38cm" svg:height="1.077cm" svg:x="25.51cm" svg:y="4.32cm">
          <draw:text-box>
            <text:p text:style-name="P132">s</text:p>
          </draw:text-box>
        </draw:frame>
        <draw:rect draw:style-name="gr33" draw:text-style-name="P131" draw:layer="layout" svg:width="3.3cm" svg:height="1.55cm" svg:x="28.95cm" svg:y="3.9cm">
          <text:p/>
        </draw:rect>
        <draw:frame draw:style-name="gr20" draw:text-style-name="P133" draw:layer="layout" svg:width="3.18cm" svg:height="1.077cm" svg:x="29.01cm" svg:y="4.32cm">
          <draw:text-box>
            <text:p text:style-name="P132">Nodos</text:p>
          </draw:text-box>
        </draw:frame>
        <draw:rect draw:style-name="gr34" draw:text-style-name="P15" draw:layer="layout" svg:width="8.2cm" svg:height="1.55cm" svg:x="1.25cm" svg:y="5.45cm">
          <text:p/>
        </draw:rect>
        <draw:frame draw:style-name="gr20" draw:text-style-name="P135" draw:layer="layout" svg:width="8cm" svg:height="1.077cm" svg:x="1.35cm" svg:y="5.84cm">
          <draw:text-box>
            <text:p text:style-name="P134">Ejemplo PDF</text:p>
          </draw:text-box>
        </draw:frame>
        <draw:rect draw:style-name="gr34" draw:text-style-name="P15" draw:layer="layout" svg:width="2.5cm" svg:height="1.55cm" svg:x="9.45cm" svg:y="5.45cm">
          <text:p/>
        </draw:rect>
        <draw:frame draw:style-name="gr20" draw:text-style-name="P137" draw:layer="layout" svg:width="2.3cm" svg:height="1.077cm" svg:x="9.55cm" svg:y="5.84cm">
          <draw:text-box>
            <text:p text:style-name="P136">20</text:p>
          </draw:text-box>
        </draw:frame>
        <draw:rect draw:style-name="gr34" draw:text-style-name="P15" draw:layer="layout" svg:width="2.5cm" svg:height="1.55cm" svg:x="11.95cm" svg:y="5.45cm">
          <text:p/>
        </draw:rect>
        <draw:frame draw:style-name="gr20" draw:text-style-name="P137" draw:layer="layout" svg:width="2.3cm" svg:height="1.077cm" svg:x="12.05cm" svg:y="5.84cm">
          <draw:text-box>
            <text:p text:style-name="P136">5</text:p>
          </draw:text-box>
        </draw:frame>
        <draw:rect draw:style-name="gr34" draw:text-style-name="P15" draw:layer="layout" svg:width="4.2cm" svg:height="1.55cm" svg:x="14.45cm" svg:y="5.45cm">
          <text:p/>
        </draw:rect>
        <draw:frame draw:style-name="gr20" draw:text-style-name="P137" draw:layer="layout" svg:width="4cm" svg:height="1.077cm" svg:x="14.55cm" svg:y="5.84cm">
          <draw:text-box>
            <text:p text:style-name="P136">19.2</text:p>
          </draw:text-box>
        </draw:frame>
        <draw:rect draw:style-name="gr34" draw:text-style-name="P15" draw:layer="layout" svg:width="3.5cm" svg:height="1.55cm" svg:x="18.65cm" svg:y="5.45cm">
          <text:p/>
        </draw:rect>
        <draw:frame draw:style-name="gr20" draw:text-style-name="P137" draw:layer="layout" svg:width="3.3cm" svg:height="1.077cm" svg:x="18.75cm" svg:y="5.84cm">
          <draw:text-box>
            <text:p text:style-name="P136">14</text:p>
          </draw:text-box>
        </draw:frame>
        <draw:rect draw:style-name="gr34" draw:text-style-name="P15" draw:layer="layout" svg:width="3.3cm" svg:height="1.55cm" svg:x="22.15cm" svg:y="5.45cm">
          <text:p/>
        </draw:rect>
        <draw:frame draw:style-name="gr20" draw:text-style-name="P139" draw:layer="layout" svg:width="3.1cm" svg:height="1.077cm" svg:x="22.25cm" svg:y="5.84cm">
          <draw:text-box>
            <text:p text:style-name="P138">0.5</text:p>
          </draw:text-box>
        </draw:frame>
        <draw:rect draw:style-name="gr34" draw:text-style-name="P15" draw:layer="layout" svg:width="3.5cm" svg:height="1.55cm" svg:x="25.45cm" svg:y="5.45cm">
          <text:p/>
        </draw:rect>
        <draw:frame draw:style-name="gr20" draw:text-style-name="P137" draw:layer="layout" svg:width="3.3cm" svg:height="1.077cm" svg:x="25.55cm" svg:y="5.84cm">
          <draw:text-box>
            <text:p text:style-name="P136">0.0255</text:p>
          </draw:text-box>
        </draw:frame>
        <draw:rect draw:style-name="gr34" draw:text-style-name="P15" draw:layer="layout" svg:width="3.3cm" svg:height="1.55cm" svg:x="28.95cm" svg:y="5.45cm">
          <text:p/>
        </draw:rect>
        <draw:frame draw:style-name="gr20" draw:text-style-name="P137" draw:layer="layout" svg:width="3.1cm" svg:height="1.077cm" svg:x="29.05cm" svg:y="5.84cm">
          <draw:text-box>
            <text:p text:style-name="P136">1</text:p>
          </draw:text-box>
        </draw:frame>
        <draw:rect draw:style-name="gr35" draw:text-style-name="P64" draw:layer="layout" svg:width="8.2cm" svg:height="1.55cm" svg:x="1.25cm" svg:y="7cm">
          <text:p/>
        </draw:rect>
        <draw:frame draw:style-name="gr20" draw:text-style-name="P135" draw:layer="layout" svg:width="8cm" svg:height="1.077cm" svg:x="1.35cm" svg:y="7.39cm">
          <draw:text-box>
            <text:p text:style-name="P134">Consenso</text:p>
          </draw:text-box>
        </draw:frame>
        <draw:rect draw:style-name="gr35" draw:text-style-name="P64" draw:layer="layout" svg:width="2.5cm" svg:height="1.55cm" svg:x="9.45cm" svg:y="7cm">
          <text:p/>
        </draw:rect>
        <draw:frame draw:style-name="gr20" draw:text-style-name="P137" draw:layer="layout" svg:width="2.3cm" svg:height="1.077cm" svg:x="9.55cm" svg:y="7.39cm">
          <draw:text-box>
            <text:p text:style-name="P136">10</text:p>
          </draw:text-box>
        </draw:frame>
        <draw:rect draw:style-name="gr35" draw:text-style-name="P64" draw:layer="layout" svg:width="2.5cm" svg:height="1.55cm" svg:x="11.95cm" svg:y="7cm">
          <text:p/>
        </draw:rect>
        <draw:frame draw:style-name="gr20" draw:text-style-name="P137" draw:layer="layout" svg:width="2.3cm" svg:height="1.077cm" svg:x="12.05cm" svg:y="7.39cm">
          <draw:text-box>
            <text:p text:style-name="P136">4</text:p>
          </draw:text-box>
        </draw:frame>
        <draw:rect draw:style-name="gr35" draw:text-style-name="P64" draw:layer="layout" svg:width="4.2cm" svg:height="1.55cm" svg:x="14.45cm" svg:y="7cm">
          <text:p/>
        </draw:rect>
        <draw:frame draw:style-name="gr20" draw:text-style-name="P137" draw:layer="layout" svg:width="4cm" svg:height="1.077cm" svg:x="14.55cm" svg:y="7.39cm">
          <draw:text-box>
            <text:p text:style-name="P136">11.7</text:p>
          </draw:text-box>
        </draw:frame>
        <draw:rect draw:style-name="gr35" draw:text-style-name="P64" draw:layer="layout" svg:width="3.5cm" svg:height="1.55cm" svg:x="18.65cm" svg:y="7cm">
          <text:p/>
        </draw:rect>
        <draw:frame draw:style-name="gr20" draw:text-style-name="P137" draw:layer="layout" svg:width="3.3cm" svg:height="1.077cm" svg:x="18.75cm" svg:y="7.39cm">
          <draw:text-box>
            <text:p text:style-name="P136">6</text:p>
          </draw:text-box>
        </draw:frame>
        <draw:rect draw:style-name="gr35" draw:text-style-name="P64" draw:layer="layout" svg:width="3.3cm" svg:height="1.55cm" svg:x="22.15cm" svg:y="7cm">
          <text:p/>
        </draw:rect>
        <draw:frame draw:style-name="gr20" draw:text-style-name="P141" draw:layer="layout" svg:width="3.1cm" svg:height="1.077cm" svg:x="22.25cm" svg:y="7.39cm">
          <draw:text-box>
            <text:p text:style-name="P140">0</text:p>
          </draw:text-box>
        </draw:frame>
        <draw:rect draw:style-name="gr35" draw:text-style-name="P64" draw:layer="layout" svg:width="3.5cm" svg:height="1.55cm" svg:x="25.45cm" svg:y="7cm">
          <text:p/>
        </draw:rect>
        <draw:frame draw:style-name="gr20" draw:text-style-name="P137" draw:layer="layout" svg:width="3.3cm" svg:height="1.077cm" svg:x="25.55cm" svg:y="7.39cm">
          <draw:text-box>
            <text:p text:style-name="P136">0.0121</text:p>
          </draw:text-box>
        </draw:frame>
        <draw:rect draw:style-name="gr35" draw:text-style-name="P64" draw:layer="layout" svg:width="3.3cm" svg:height="1.55cm" svg:x="28.95cm" svg:y="7cm">
          <text:p/>
        </draw:rect>
        <draw:frame draw:style-name="gr20" draw:text-style-name="P137" draw:layer="layout" svg:width="3.1cm" svg:height="1.077cm" svg:x="29.05cm" svg:y="7.39cm">
          <draw:text-box>
            <text:p text:style-name="P136">1</text:p>
          </draw:text-box>
        </draw:frame>
        <draw:rect draw:style-name="gr34" draw:text-style-name="P15" draw:layer="layout" svg:width="8.2cm" svg:height="1.55cm" svg:x="1.25cm" svg:y="8.55cm">
          <text:p/>
        </draw:rect>
        <draw:frame draw:style-name="gr20" draw:text-style-name="P135" draw:layer="layout" svg:width="8cm" svg:height="1.077cm" svg:x="1.35cm" svg:y="8.94cm">
          <draw:text-box>
            <text:p text:style-name="P134">Presupuesto bajo</text:p>
          </draw:text-box>
        </draw:frame>
        <draw:rect draw:style-name="gr34" draw:text-style-name="P15" draw:layer="layout" svg:width="2.5cm" svg:height="1.55cm" svg:x="9.45cm" svg:y="8.55cm">
          <text:p/>
        </draw:rect>
        <draw:frame draw:style-name="gr20" draw:text-style-name="P137" draw:layer="layout" svg:width="2.3cm" svg:height="1.077cm" svg:x="9.55cm" svg:y="8.94cm">
          <draw:text-box>
            <text:p text:style-name="P136">20</text:p>
          </draw:text-box>
        </draw:frame>
        <draw:rect draw:style-name="gr34" draw:text-style-name="P15" draw:layer="layout" svg:width="2.5cm" svg:height="1.55cm" svg:x="11.95cm" svg:y="8.55cm">
          <text:p/>
        </draw:rect>
        <draw:frame draw:style-name="gr20" draw:text-style-name="P137" draw:layer="layout" svg:width="2.3cm" svg:height="1.077cm" svg:x="12.05cm" svg:y="8.94cm">
          <draw:text-box>
            <text:p text:style-name="P136">5</text:p>
          </draw:text-box>
        </draw:frame>
        <draw:rect draw:style-name="gr34" draw:text-style-name="P15" draw:layer="layout" svg:width="4.2cm" svg:height="1.55cm" svg:x="14.45cm" svg:y="8.55cm">
          <text:p/>
        </draw:rect>
        <draw:frame draw:style-name="gr20" draw:text-style-name="P137" draw:layer="layout" svg:width="4cm" svg:height="1.077cm" svg:x="14.55cm" svg:y="8.94cm">
          <draw:text-box>
            <text:p text:style-name="P136">9.8</text:p>
          </draw:text-box>
        </draw:frame>
        <draw:rect draw:style-name="gr34" draw:text-style-name="P15" draw:layer="layout" svg:width="3.5cm" svg:height="1.55cm" svg:x="18.65cm" svg:y="8.55cm">
          <text:p/>
        </draw:rect>
        <draw:frame draw:style-name="gr20" draw:text-style-name="P137" draw:layer="layout" svg:width="3.3cm" svg:height="1.077cm" svg:x="18.75cm" svg:y="8.94cm">
          <draw:text-box>
            <text:p text:style-name="P136">7</text:p>
          </draw:text-box>
        </draw:frame>
        <draw:rect draw:style-name="gr34" draw:text-style-name="P15" draw:layer="layout" svg:width="3.3cm" svg:height="1.55cm" svg:x="22.15cm" svg:y="8.55cm">
          <text:p/>
        </draw:rect>
        <draw:frame draw:style-name="gr20" draw:text-style-name="P139" draw:layer="layout" svg:width="3.1cm" svg:height="1.077cm" svg:x="22.25cm" svg:y="8.94cm">
          <draw:text-box>
            <text:p text:style-name="P138">5.8</text:p>
          </draw:text-box>
        </draw:frame>
        <draw:rect draw:style-name="gr34" draw:text-style-name="P15" draw:layer="layout" svg:width="3.5cm" svg:height="1.55cm" svg:x="25.45cm" svg:y="8.55cm">
          <text:p/>
        </draw:rect>
        <draw:frame draw:style-name="gr20" draw:text-style-name="P137" draw:layer="layout" svg:width="3.3cm" svg:height="1.077cm" svg:x="25.55cm" svg:y="8.94cm">
          <draw:text-box>
            <text:p text:style-name="P136">0.1048</text:p>
          </draw:text-box>
        </draw:frame>
        <draw:rect draw:style-name="gr34" draw:text-style-name="P15" draw:layer="layout" svg:width="3.3cm" svg:height="1.55cm" svg:x="28.95cm" svg:y="8.55cm">
          <text:p/>
        </draw:rect>
        <draw:frame draw:style-name="gr20" draw:text-style-name="P137" draw:layer="layout" svg:width="3.1cm" svg:height="1.077cm" svg:x="29.05cm" svg:y="8.94cm">
          <draw:text-box>
            <text:p text:style-name="P136">9</text:p>
          </draw:text-box>
        </draw:frame>
        <draw:rect draw:style-name="gr35" draw:text-style-name="P64" draw:layer="layout" svg:width="8.2cm" svg:height="1.55cm" svg:x="1.25cm" svg:y="10.1cm">
          <text:p/>
        </draw:rect>
        <draw:frame draw:style-name="gr20" draw:text-style-name="P135" draw:layer="layout" svg:width="8cm" svg:height="1.077cm" svg:x="1.35cm" svg:y="10.49cm">
          <draw:text-box>
            <text:p text:style-name="P134">Costo extra alto</text:p>
          </draw:text-box>
        </draw:frame>
        <draw:rect draw:style-name="gr35" draw:text-style-name="P64" draw:layer="layout" svg:width="2.5cm" svg:height="1.55cm" svg:x="9.45cm" svg:y="10.1cm">
          <text:p/>
        </draw:rect>
        <draw:frame draw:style-name="gr20" draw:text-style-name="P137" draw:layer="layout" svg:width="2.3cm" svg:height="1.077cm" svg:x="9.55cm" svg:y="10.49cm">
          <draw:text-box>
            <text:p text:style-name="P136">24</text:p>
          </draw:text-box>
        </draw:frame>
        <draw:rect draw:style-name="gr35" draw:text-style-name="P64" draw:layer="layout" svg:width="2.5cm" svg:height="1.55cm" svg:x="11.95cm" svg:y="10.1cm">
          <text:p/>
        </draw:rect>
        <draw:frame draw:style-name="gr20" draw:text-style-name="P137" draw:layer="layout" svg:width="2.3cm" svg:height="1.077cm" svg:x="12.05cm" svg:y="10.49cm">
          <draw:text-box>
            <text:p text:style-name="P136">6</text:p>
          </draw:text-box>
        </draw:frame>
        <draw:rect draw:style-name="gr35" draw:text-style-name="P64" draw:layer="layout" svg:width="4.2cm" svg:height="1.55cm" svg:x="14.45cm" svg:y="10.1cm">
          <text:p/>
        </draw:rect>
        <draw:frame draw:style-name="gr20" draw:text-style-name="P137" draw:layer="layout" svg:width="4cm" svg:height="1.077cm" svg:x="14.55cm" svg:y="10.49cm">
          <draw:text-box>
            <text:p text:style-name="P136">30</text:p>
          </draw:text-box>
        </draw:frame>
        <draw:rect draw:style-name="gr35" draw:text-style-name="P64" draw:layer="layout" svg:width="3.5cm" svg:height="1.55cm" svg:x="18.65cm" svg:y="10.1cm">
          <text:p/>
        </draw:rect>
        <draw:frame draw:style-name="gr20" draw:text-style-name="P137" draw:layer="layout" svg:width="3.3cm" svg:height="1.077cm" svg:x="18.75cm" svg:y="10.49cm">
          <draw:text-box>
            <text:p text:style-name="P136">18</text:p>
          </draw:text-box>
        </draw:frame>
        <draw:rect draw:style-name="gr35" draw:text-style-name="P64" draw:layer="layout" svg:width="3.3cm" svg:height="1.55cm" svg:x="22.15cm" svg:y="10.1cm">
          <text:p/>
        </draw:rect>
        <draw:frame draw:style-name="gr20" draw:text-style-name="P139" draw:layer="layout" svg:width="3.1cm" svg:height="1.077cm" svg:x="22.25cm" svg:y="10.49cm">
          <draw:text-box>
            <text:p text:style-name="P138">6.75</text:p>
          </draw:text-box>
        </draw:frame>
        <draw:rect draw:style-name="gr35" draw:text-style-name="P64" draw:layer="layout" svg:width="3.5cm" svg:height="1.55cm" svg:x="25.45cm" svg:y="10.1cm">
          <text:p/>
        </draw:rect>
        <draw:frame draw:style-name="gr20" draw:text-style-name="P137" draw:layer="layout" svg:width="3.3cm" svg:height="1.077cm" svg:x="25.55cm" svg:y="10.49cm">
          <draw:text-box>
            <text:p text:style-name="P136">0.1867</text:p>
          </draw:text-box>
        </draw:frame>
        <draw:rect draw:style-name="gr35" draw:text-style-name="P64" draw:layer="layout" svg:width="3.3cm" svg:height="1.55cm" svg:x="28.95cm" svg:y="10.1cm">
          <text:p/>
        </draw:rect>
        <draw:frame draw:style-name="gr20" draw:text-style-name="P137" draw:layer="layout" svg:width="3.1cm" svg:height="1.077cm" svg:x="29.05cm" svg:y="10.49cm">
          <draw:text-box>
            <text:p text:style-name="P136">11</text:p>
          </draw:text-box>
        </draw:frame>
        <draw:rect draw:style-name="gr34" draw:text-style-name="P15" draw:layer="layout" svg:width="8.2cm" svg:height="1.55cm" svg:x="1.25cm" svg:y="11.65cm">
          <text:p/>
        </draw:rect>
        <draw:frame draw:style-name="gr20" draw:text-style-name="P135" draw:layer="layout" svg:width="8cm" svg:height="1.077cm" svg:x="1.35cm" svg:y="12.04cm">
          <draw:text-box>
            <text:p text:style-name="P134">Decimales</text:p>
          </draw:text-box>
        </draw:frame>
        <draw:rect draw:style-name="gr34" draw:text-style-name="P15" draw:layer="layout" svg:width="2.5cm" svg:height="1.55cm" svg:x="9.45cm" svg:y="11.65cm">
          <text:p/>
        </draw:rect>
        <draw:frame draw:style-name="gr20" draw:text-style-name="P137" draw:layer="layout" svg:width="2.3cm" svg:height="1.077cm" svg:x="9.55cm" svg:y="12.04cm">
          <draw:text-box>
            <text:p text:style-name="P136">18</text:p>
          </draw:text-box>
        </draw:frame>
        <draw:rect draw:style-name="gr34" draw:text-style-name="P15" draw:layer="layout" svg:width="2.5cm" svg:height="1.55cm" svg:x="11.95cm" svg:y="11.65cm">
          <text:p/>
        </draw:rect>
        <draw:frame draw:style-name="gr20" draw:text-style-name="P137" draw:layer="layout" svg:width="2.3cm" svg:height="1.077cm" svg:x="12.05cm" svg:y="12.04cm">
          <draw:text-box>
            <text:p text:style-name="P136">6</text:p>
          </draw:text-box>
        </draw:frame>
        <draw:rect draw:style-name="gr34" draw:text-style-name="P15" draw:layer="layout" svg:width="4.2cm" svg:height="1.55cm" svg:x="14.45cm" svg:y="11.65cm">
          <text:p/>
        </draw:rect>
        <draw:frame draw:style-name="gr20" draw:text-style-name="P137" draw:layer="layout" svg:width="4cm" svg:height="1.077cm" svg:x="14.55cm" svg:y="12.04cm">
          <draw:text-box>
            <text:p text:style-name="P136">18.6667</text:p>
          </draw:text-box>
        </draw:frame>
        <draw:rect draw:style-name="gr34" draw:text-style-name="P15" draw:layer="layout" svg:width="3.5cm" svg:height="1.55cm" svg:x="18.65cm" svg:y="11.65cm">
          <text:p/>
        </draw:rect>
        <draw:frame draw:style-name="gr20" draw:text-style-name="P137" draw:layer="layout" svg:width="3.3cm" svg:height="1.077cm" svg:x="18.75cm" svg:y="12.04cm">
          <draw:text-box>
            <text:p text:style-name="P136">14</text:p>
          </draw:text-box>
        </draw:frame>
        <draw:rect draw:style-name="gr34" draw:text-style-name="P15" draw:layer="layout" svg:width="3.3cm" svg:height="1.55cm" svg:x="22.15cm" svg:y="11.65cm">
          <text:p/>
        </draw:rect>
        <draw:frame draw:style-name="gr20" draw:text-style-name="P139" draw:layer="layout" svg:width="3.1cm" svg:height="1.077cm" svg:x="22.25cm" svg:y="12.04cm">
          <draw:text-box>
            <text:p text:style-name="P138">2.75</text:p>
          </draw:text-box>
        </draw:frame>
        <draw:rect draw:style-name="gr34" draw:text-style-name="P15" draw:layer="layout" svg:width="3.5cm" svg:height="1.55cm" svg:x="25.45cm" svg:y="11.65cm">
          <text:p/>
        </draw:rect>
        <draw:frame draw:style-name="gr20" draw:text-style-name="P137" draw:layer="layout" svg:width="3.3cm" svg:height="1.077cm" svg:x="25.55cm" svg:y="12.04cm">
          <draw:text-box>
            <text:p text:style-name="P136">0.2588</text:p>
          </draw:text-box>
        </draw:frame>
        <draw:rect draw:style-name="gr34" draw:text-style-name="P15" draw:layer="layout" svg:width="3.3cm" svg:height="1.55cm" svg:x="28.95cm" svg:y="11.65cm">
          <text:p/>
        </draw:rect>
        <draw:frame draw:style-name="gr20" draw:text-style-name="P137" draw:layer="layout" svg:width="3.1cm" svg:height="1.077cm" svg:x="29.05cm" svg:y="12.04cm">
          <draw:text-box>
            <text:p text:style-name="P136">76</text:p>
          </draw:text-box>
        </draw:frame>
        <draw:rect draw:style-name="gr35" draw:text-style-name="P64" draw:layer="layout" svg:width="8.2cm" svg:height="1.55cm" svg:x="1.25cm" svg:y="13.2cm">
          <text:p/>
        </draw:rect>
        <draw:frame draw:style-name="gr20" draw:text-style-name="P135" draw:layer="layout" svg:width="8cm" svg:height="1.077cm" svg:x="1.35cm" svg:y="13.59cm">
          <draw:text-box>
            <text:p text:style-name="P134">Instancia grande</text:p>
          </draw:text-box>
        </draw:frame>
        <draw:rect draw:style-name="gr35" draw:text-style-name="P64" draw:layer="layout" svg:width="2.5cm" svg:height="1.55cm" svg:x="9.45cm" svg:y="13.2cm">
          <text:p/>
        </draw:rect>
        <draw:frame draw:style-name="gr20" draw:text-style-name="P137" draw:layer="layout" svg:width="2.3cm" svg:height="1.077cm" svg:x="9.55cm" svg:y="13.59cm">
          <draw:text-box>
            <text:p text:style-name="P136">40</text:p>
          </draw:text-box>
        </draw:frame>
        <draw:rect draw:style-name="gr35" draw:text-style-name="P64" draw:layer="layout" svg:width="2.5cm" svg:height="1.55cm" svg:x="11.95cm" svg:y="13.2cm">
          <text:p/>
        </draw:rect>
        <draw:frame draw:style-name="gr20" draw:text-style-name="P137" draw:layer="layout" svg:width="2.3cm" svg:height="1.077cm" svg:x="12.05cm" svg:y="13.59cm">
          <draw:text-box>
            <text:p text:style-name="P136">8</text:p>
          </draw:text-box>
        </draw:frame>
        <draw:rect draw:style-name="gr35" draw:text-style-name="P64" draw:layer="layout" svg:width="4.2cm" svg:height="1.55cm" svg:x="14.45cm" svg:y="13.2cm">
          <text:p/>
        </draw:rect>
        <draw:frame draw:style-name="gr20" draw:text-style-name="P137" draw:layer="layout" svg:width="4cm" svg:height="1.077cm" svg:x="14.55cm" svg:y="13.59cm">
          <draw:text-box>
            <text:p text:style-name="P136">44.85</text:p>
          </draw:text-box>
        </draw:frame>
        <draw:rect draw:style-name="gr35" draw:text-style-name="P64" draw:layer="layout" svg:width="3.5cm" svg:height="1.55cm" svg:x="18.65cm" svg:y="13.2cm">
          <text:p/>
        </draw:rect>
        <draw:frame draw:style-name="gr20" draw:text-style-name="P137" draw:layer="layout" svg:width="3.3cm" svg:height="1.077cm" svg:x="18.75cm" svg:y="13.59cm">
          <draw:text-box>
            <text:p text:style-name="P136">24</text:p>
          </draw:text-box>
        </draw:frame>
        <draw:rect draw:style-name="gr35" draw:text-style-name="P64" draw:layer="layout" svg:width="3.3cm" svg:height="1.55cm" svg:x="22.15cm" svg:y="13.2cm">
          <text:p/>
        </draw:rect>
        <draw:frame draw:style-name="gr20" draw:text-style-name="P139" draw:layer="layout" svg:width="3.1cm" svg:height="1.077cm" svg:x="22.25cm" svg:y="13.59cm">
          <draw:text-box>
            <text:p text:style-name="P138">11.7</text:p>
          </draw:text-box>
        </draw:frame>
        <draw:rect draw:style-name="gr35" draw:text-style-name="P64" draw:layer="layout" svg:width="3.5cm" svg:height="1.55cm" svg:x="25.45cm" svg:y="13.2cm">
          <text:p/>
        </draw:rect>
        <draw:frame draw:style-name="gr20" draw:text-style-name="P137" draw:layer="layout" svg:width="3.3cm" svg:height="1.077cm" svg:x="25.55cm" svg:y="13.59cm">
          <draw:text-box>
            <text:p text:style-name="P136">0.3547</text:p>
          </draw:text-box>
        </draw:frame>
        <draw:rect draw:style-name="gr35" draw:text-style-name="P64" draw:layer="layout" svg:width="3.3cm" svg:height="1.55cm" svg:x="28.95cm" svg:y="13.2cm">
          <text:p/>
        </draw:rect>
        <draw:frame draw:style-name="gr20" draw:text-style-name="P137" draw:layer="layout" svg:width="3.1cm" svg:height="1.077cm" svg:x="29.05cm" svg:y="13.59cm">
          <draw:text-box>
            <text:p text:style-name="P136">15</text:p>
          </draw:text-box>
        </draw:frame>
        <draw:frame draw:style-name="gr20" draw:text-style-name="P143" draw:layer="layout" svg:width="30cm" svg:height="1.077cm" svg:x="1.5cm" svg:y="14.8cm">
          <draw:text-box>
            <text:p text:style-name="P142">30/30 entradas suministradas: óptimas y verificadas · 23 coincidencias textuales · 7 diferencias de 0.001</text:p>
          </draw:text-box>
        </draw:frame>
        <presentation:notes draw:style-name="dp2">
          <draw:page-thumbnail draw:style-name="gr19" draw:layer="layout" svg:width="19.798cm" svg:height="11.136cm" svg:x="0.6cm" svg:y="2.257cm" draw:page-number="10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rect draw:style-name="gr1" draw:text-style-name="P1" draw:layer="layout" svg:width="33.867cm" svg:height="19.05cm" svg:x="0cm" svg:y="0cm">
          <text:p/>
        </draw:rect>
        <draw:rect draw:style-name="gr2" draw:text-style-name="P2" draw:layer="layout" svg:width="33.867cm" svg:height="0.17cm" svg:x="0cm" svg:y="0cm">
          <text:p/>
        </draw:rect>
        <draw:rect draw:style-name="gr26" draw:text-style-name="P58" draw:layer="layout" svg:width="33.867cm" svg:height="0.055cm" svg:x="0cm" svg:y="0.17cm">
          <text:p/>
        </draw:rect>
        <draw:frame draw:style-name="gr20" draw:text-style-name="P5" draw:layer="layout" svg:width="0.9cm" svg:height="1.077cm" svg:x="1.18cm" svg:y="18.16cm">
          <draw:text-box>
            <text:p text:style-name="P4">11</text:p>
          </draw:text-box>
        </draw:frame>
        <draw:frame draw:style-name="gr20" draw:text-style-name="P7" draw:layer="layout" svg:width="12cm" svg:height="1.077cm" svg:x="2.2cm" svg:y="18.16cm">
          <draw:text-box>
            <text:p text:style-name="P6">Juan Esteban Rodriguez Valencia <text:s/>· <text:s/>7:20–8:10</text:p>
          </draw:text-box>
        </draw:frame>
        <draw:rect draw:style-name="gr5" draw:text-style-name="P8" draw:layer="layout" svg:width="5.6cm" svg:height="0.06cm" svg:x="26.9cm" svg:y="18.33cm">
          <text:p/>
        </draw:rect>
        <draw:rect draw:style-name="gr26" draw:text-style-name="P58" draw:layer="layout" svg:width="4.2cm" svg:height="0.06cm" svg:x="26.9cm" svg:y="18.33cm">
          <text:p/>
        </draw:rect>
        <draw:frame draw:style-name="gr20" draw:text-style-name="P25" draw:layer="layout" svg:width="7.2cm" svg:height="1.077cm" svg:x="1.25cm" svg:y="0.7cm">
          <draw:text-box>
            <text:p text:style-name="P24">3 · RESULTADOS Y ANÁLISIS</text:p>
          </draw:text-box>
        </draw:frame>
        <draw:frame draw:style-name="gr20" draw:text-style-name="P33" draw:layer="layout" svg:width="31cm" svg:height="1.538cm" svg:x="1.18cm" svg:y="1.28cm">
          <draw:text-box>
            <text:p text:style-name="P32">Presupuesto y recargos cambian el óptimo</text:p>
          </draw:text-box>
        </draw:frame>
        <draw:frame draw:style-name="gr20" draw:text-style-name="P35" draw:layer="layout" svg:width="30.5cm" svg:height="1.077cm" svg:x="1.25cm" svg:y="2.42cm">
          <draw:text-box>
            <text:p text:style-name="P34">Las comparaciones aíslan un parámetro y mantienen los demás fijos</text:p>
          </draw:text-box>
        </draw:frame>
        <draw:rect draw:style-name="gr5" draw:text-style-name="P8" draw:layer="layout" svg:width="31cm" svg:height="0.02cm" svg:x="1.25cm" svg:y="3.23cm">
          <text:p/>
        </draw:rect>
        <draw:rect draw:style-name="gr36" draw:text-style-name="P144" draw:layer="layout" svg:width="15cm" svg:height="8.4cm" svg:x="1.25cm" svg:y="3.9cm" draw:corner-radius="0.06cm">
          <text:p/>
        </draw:rect>
        <draw:frame draw:style-name="gr37" draw:text-style-name="P40" draw:layer="layout" svg:width="14.82cm" svg:height="8.22cm" svg:x="1.34cm" svg:y="3.99cm">
          <draw:image xlink:href="Pictures/10000000000004B0000002BCA86A531D.png" xlink:type="simple" xlink:show="embed" xlink:actuate="onLoad" draw:mime-type="image/png">
            <text:p/>
          </draw:image>
        </draw:frame>
        <draw:rect draw:style-name="gr36" draw:text-style-name="P144" draw:layer="layout" svg:width="15.25cm" svg:height="8.4cm" svg:x="17cm" svg:y="3.9cm" draw:corner-radius="0.06cm">
          <text:p/>
        </draw:rect>
        <draw:frame draw:style-name="gr37" draw:text-style-name="P40" draw:layer="layout" svg:width="15.07cm" svg:height="8.22cm" svg:x="17.09cm" svg:y="3.99cm">
          <draw:image xlink:href="Pictures/10000000000004B0000002BCE601D4D8.png" xlink:type="simple" xlink:show="embed" xlink:actuate="onLoad" draw:mime-type="image/png">
            <text:p/>
          </draw:image>
        </draw:frame>
        <draw:rect draw:style-name="gr6" draw:text-style-name="P1" draw:layer="layout" svg:width="12cm" svg:height="0.62cm" svg:x="2.9cm" svg:y="13.2cm" draw:corner-radius="0.04cm">
          <text:p/>
        </draw:rect>
        <draw:frame draw:style-name="gr30" draw:text-style-name="P10" draw:layer="layout" svg:width="11.76cm" svg:height="0.977cm" svg:x="3.02cm" svg:y="13.305cm">
          <draw:text-box>
            <text:p text:style-name="P9">ct: 0 → 24 <text:s/>· <text:s/>polarización: 4 → 0</text:p>
          </draw:text-box>
        </draw:frame>
        <draw:rect draw:style-name="gr29" draw:text-style-name="P1" draw:layer="layout" svg:width="13.2cm" svg:height="0.62cm" svg:x="18.1cm" svg:y="13.2cm" draw:corner-radius="0.04cm">
          <text:p/>
        </draw:rect>
        <draw:frame draw:style-name="gr30" draw:text-style-name="P92" draw:layer="layout" svg:width="12.96cm" svg:height="0.977cm" svg:x="18.22cm" svg:y="13.305cm">
          <draw:text-box>
            <text:p text:style-name="P91">ce: 12 → 0 <text:s/>· <text:s/>polarización: 6.75 → 6</text:p>
          </draw:text-box>
        </draw:frame>
        <presentation:notes draw:style-name="dp2">
          <draw:page-thumbnail draw:style-name="gr19" draw:layer="layout" svg:width="19.798cm" svg:height="11.136cm" svg:x="0.6cm" svg:y="2.257cm" draw:page-number="11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rect draw:style-name="gr1" draw:text-style-name="P1" draw:layer="layout" svg:width="33.867cm" svg:height="19.05cm" svg:x="0cm" svg:y="0cm">
          <text:p/>
        </draw:rect>
        <draw:rect draw:style-name="gr2" draw:text-style-name="P2" draw:layer="layout" svg:width="33.867cm" svg:height="0.17cm" svg:x="0cm" svg:y="0cm">
          <text:p/>
        </draw:rect>
        <draw:rect draw:style-name="gr26" draw:text-style-name="P58" draw:layer="layout" svg:width="33.867cm" svg:height="0.055cm" svg:x="0cm" svg:y="0.17cm">
          <text:p/>
        </draw:rect>
        <draw:frame draw:style-name="gr20" draw:text-style-name="P5" draw:layer="layout" svg:width="0.9cm" svg:height="1.077cm" svg:x="1.18cm" svg:y="18.16cm">
          <draw:text-box>
            <text:p text:style-name="P4">12</text:p>
          </draw:text-box>
        </draw:frame>
        <draw:frame draw:style-name="gr20" draw:text-style-name="P7" draw:layer="layout" svg:width="12cm" svg:height="1.077cm" svg:x="2.2cm" svg:y="18.16cm">
          <draw:text-box>
            <text:p text:style-name="P6">Juan Esteban Rodriguez Valencia <text:s/>· <text:s/>8:10–9:00</text:p>
          </draw:text-box>
        </draw:frame>
        <draw:rect draw:style-name="gr5" draw:text-style-name="P8" draw:layer="layout" svg:width="5.6cm" svg:height="0.06cm" svg:x="26.9cm" svg:y="18.33cm">
          <text:p/>
        </draw:rect>
        <draw:rect draw:style-name="gr26" draw:text-style-name="P58" draw:layer="layout" svg:width="4.2cm" svg:height="0.06cm" svg:x="26.9cm" svg:y="18.33cm">
          <text:p/>
        </draw:rect>
        <draw:frame draw:style-name="gr20" draw:text-style-name="P25" draw:layer="layout" svg:width="7.2cm" svg:height="1.077cm" svg:x="1.25cm" svg:y="0.7cm">
          <draw:text-box>
            <text:p text:style-name="P24">3 · RESULTADOS Y ANÁLISIS</text:p>
          </draw:text-box>
        </draw:frame>
        <draw:frame draw:style-name="gr20" draw:text-style-name="P33" draw:layer="layout" svg:width="31cm" svg:height="1.538cm" svg:x="1.18cm" svg:y="1.28cm">
          <draw:text-box>
            <text:p text:style-name="P32">Branch and Bound: ramificar, acotar y podar</text:p>
          </draw:text-box>
        </draw:frame>
        <draw:frame draw:style-name="gr20" draw:text-style-name="P35" draw:layer="layout" svg:width="30.5cm" svg:height="1.077cm" svg:x="1.25cm" svg:y="2.42cm">
          <draw:text-box>
            <text:p text:style-name="P34">Tamaño: m² variables x + m² auxiliares q + m binarias z</text:p>
          </draw:text-box>
        </draw:frame>
        <draw:rect draw:style-name="gr5" draw:text-style-name="P8" draw:layer="layout" svg:width="31cm" svg:height="0.02cm" svg:x="1.25cm" svg:y="3.23cm">
          <text:p/>
        </draw:rect>
        <draw:rect draw:style-name="gr36" draw:text-style-name="P144" draw:layer="layout" svg:width="15.2cm" svg:height="8.8cm" svg:x="1.25cm" svg:y="3.9cm" draw:corner-radius="0.06cm">
          <text:p/>
        </draw:rect>
        <draw:frame draw:style-name="gr37" draw:text-style-name="P40" draw:layer="layout" svg:width="15.02cm" svg:height="8.62cm" svg:x="1.34cm" svg:y="3.99cm">
          <draw:image xlink:href="Pictures/10000000000004B0000002BCCB975533.png" xlink:type="simple" xlink:show="embed" xlink:actuate="onLoad" draw:mime-type="image/png">
            <text:p/>
          </draw:image>
        </draw:frame>
        <draw:rect draw:style-name="gr24" draw:text-style-name="P15" draw:layer="layout" svg:width="14.95cm" svg:height="2.1cm" svg:x="17.3cm" svg:y="3.9cm" draw:corner-radius="0.04cm">
          <text:p/>
        </draw:rect>
        <draw:rect draw:style-name="gr26" draw:text-style-name="P58" draw:layer="layout" svg:width="0.07cm" svg:height="2.1cm" svg:x="17.3cm" svg:y="3.9cm">
          <text:p/>
        </draw:rect>
        <draw:frame draw:style-name="gr20" draw:text-style-name="P60" draw:layer="layout" svg:width="14.3cm" svg:height="1.2cm" svg:x="17.66cm" svg:y="4.16cm">
          <draw:text-box>
            <text:p text:style-name="P59">RAMIFICACIÓN</text:p>
          </draw:text-box>
        </draw:frame>
        <draw:frame draw:style-name="gr20" draw:text-style-name="P146" draw:layer="layout" svg:width="14.3cm" svg:height="1.077cm" svg:x="17.66cm" svg:y="4.88cm">
          <draw:text-box>
            <text:p text:style-name="P145">Variable fraccionaria → dos subproblemas.</text:p>
          </draw:text-box>
        </draw:frame>
        <draw:rect draw:style-name="gr24" draw:text-style-name="P15" draw:layer="layout" svg:width="14.95cm" svg:height="2.1cm" svg:x="17.3cm" svg:y="6.15cm" draw:corner-radius="0.04cm">
          <text:p/>
        </draw:rect>
        <draw:rect draw:style-name="gr27" draw:text-style-name="P61" draw:layer="layout" svg:width="0.07cm" svg:height="2.1cm" svg:x="17.3cm" svg:y="6.15cm">
          <text:p/>
        </draw:rect>
        <draw:frame draw:style-name="gr20" draw:text-style-name="P63" draw:layer="layout" svg:width="14.3cm" svg:height="1.2cm" svg:x="17.66cm" svg:y="6.41cm">
          <draw:text-box>
            <text:p text:style-name="P62">PODA INFACTIBLE</text:p>
          </draw:text-box>
        </draw:frame>
        <draw:frame draw:style-name="gr20" draw:text-style-name="P146" draw:layer="layout" svg:width="14.3cm" svg:height="1.077cm" svg:x="17.66cm" svg:y="7.13cm">
          <draw:text-box>
            <text:p text:style-name="P145">La relajación lineal no tiene solución.</text:p>
          </draw:text-box>
        </draw:frame>
        <draw:rect draw:style-name="gr24" draw:text-style-name="P15" draw:layer="layout" svg:width="14.95cm" svg:height="2.1cm" svg:x="17.3cm" svg:y="8.4cm" draw:corner-radius="0.04cm">
          <text:p/>
        </draw:rect>
        <draw:rect draw:style-name="gr17" draw:text-style-name="P28" draw:layer="layout" svg:width="0.07cm" svg:height="2.1cm" svg:x="17.3cm" svg:y="8.4cm">
          <text:p/>
        </draw:rect>
        <draw:frame draw:style-name="gr20" draw:text-style-name="P53" draw:layer="layout" svg:width="14.3cm" svg:height="1.2cm" svg:x="17.66cm" svg:y="8.66cm">
          <draw:text-box>
            <text:p text:style-name="P52">PODA POR COTA</text:p>
          </draw:text-box>
        </draw:frame>
        <draw:frame draw:style-name="gr20" draw:text-style-name="P146" draw:layer="layout" svg:width="14.3cm" svg:height="1.077cm" svg:x="17.66cm" svg:y="9.38cm">
          <draw:text-box>
            <text:p text:style-name="P145">En minimización, LB ≥ UB: no mejora al incumbente.</text:p>
          </draw:text-box>
        </draw:frame>
        <draw:rect draw:style-name="gr24" draw:text-style-name="P15" draw:layer="layout" svg:width="14.95cm" svg:height="2.1cm" svg:x="17.3cm" svg:y="10.65cm" draw:corner-radius="0.04cm">
          <text:p/>
        </draw:rect>
        <draw:rect draw:style-name="gr25" draw:text-style-name="P47" draw:layer="layout" svg:width="0.07cm" svg:height="2.1cm" svg:x="17.3cm" svg:y="10.65cm">
          <text:p/>
        </draw:rect>
        <draw:frame draw:style-name="gr20" draw:text-style-name="P49" draw:layer="layout" svg:width="14.3cm" svg:height="1.2cm" svg:x="17.66cm" svg:y="10.91cm">
          <draw:text-box>
            <text:p text:style-name="P48">CIERRE INTEGRAL</text:p>
          </draw:text-box>
        </draw:frame>
        <draw:frame draw:style-name="gr20" draw:text-style-name="P148" draw:layer="layout" svg:width="14.3cm" svg:height="1.077cm" svg:x="17.66cm" svg:y="11.63cm">
          <draw:text-box>
            <text:p text:style-name="P147">Si una solución entera mejora, actualiza el incumbente y UB.</text:p>
          </draw:text-box>
        </draw:frame>
        <draw:rect draw:style-name="gr28" draw:text-style-name="P64" draw:layer="layout" svg:width="14.95cm" svg:height="1.65cm" svg:x="17.3cm" svg:y="13.1cm" draw:corner-radius="0.06cm">
          <text:p/>
        </draw:rect>
        <draw:frame draw:style-name="gr20" draw:text-style-name="P150" draw:layer="layout" svg:width="14cm" svg:height="1.077cm" svg:x="17.75cm" svg:y="13.38cm">
          <draw:text-box>
            <text:p text:style-name="P149">HiGHS: 1 nodo · Chuffed: 225 nodos</text:p>
          </draw:text-box>
        </draw:frame>
        <draw:frame draw:style-name="gr20" draw:text-style-name="P116" draw:layer="layout" svg:width="14cm" svg:height="1.077cm" svg:x="17.75cm" svg:y="14cm">
          <draw:text-box>
            <text:p text:style-name="P115">Misma instancia; estrategias distintas</text:p>
          </draw:text-box>
        </draw:frame>
        <presentation:notes draw:style-name="dp2">
          <draw:page-thumbnail draw:style-name="gr19" draw:layer="layout" svg:width="19.798cm" svg:height="11.136cm" svg:x="0.6cm" svg:y="2.257cm" draw:page-number="12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rect draw:style-name="gr1" draw:text-style-name="P1" draw:layer="layout" svg:width="33.867cm" svg:height="19.05cm" svg:x="0cm" svg:y="0cm">
          <text:p/>
        </draw:rect>
        <draw:rect draw:style-name="gr2" draw:text-style-name="P2" draw:layer="layout" svg:width="33.867cm" svg:height="0.17cm" svg:x="0cm" svg:y="0cm">
          <text:p/>
        </draw:rect>
        <draw:rect draw:style-name="gr25" draw:text-style-name="P47" draw:layer="layout" svg:width="33.867cm" svg:height="0.055cm" svg:x="0cm" svg:y="0.17cm">
          <text:p/>
        </draw:rect>
        <draw:frame draw:style-name="gr20" draw:text-style-name="P5" draw:layer="layout" svg:width="0.9cm" svg:height="1.077cm" svg:x="1.18cm" svg:y="18.16cm">
          <draw:text-box>
            <text:p text:style-name="P4">13</text:p>
          </draw:text-box>
        </draw:frame>
        <draw:frame draw:style-name="gr20" draw:text-style-name="P7" draw:layer="layout" svg:width="12cm" svg:height="1.077cm" svg:x="2.2cm" svg:y="18.16cm">
          <draw:text-box>
            <text:p text:style-name="P6">Estiven Andres Martinez Granados <text:s/>· <text:s/>9:00–10:15</text:p>
          </draw:text-box>
        </draw:frame>
        <draw:rect draw:style-name="gr5" draw:text-style-name="P8" draw:layer="layout" svg:width="5.6cm" svg:height="0.06cm" svg:x="26.9cm" svg:y="18.33cm">
          <text:p/>
        </draw:rect>
        <draw:rect draw:style-name="gr25" draw:text-style-name="P47" draw:layer="layout" svg:width="5.6cm" svg:height="0.06cm" svg:x="26.9cm" svg:y="18.33cm">
          <text:p/>
        </draw:rect>
        <draw:frame draw:style-name="gr20" draw:text-style-name="P25" draw:layer="layout" svg:width="7.2cm" svg:height="1.077cm" svg:x="1.25cm" svg:y="0.7cm">
          <draw:text-box>
            <text:p text:style-name="P24">4 · PRUEBAS Y CONCLUSIONES</text:p>
          </draw:text-box>
        </draw:frame>
        <draw:frame draw:style-name="gr20" draw:text-style-name="P33" draw:layer="layout" svg:width="31cm" svg:height="1.538cm" svg:x="1.18cm" svg:y="1.28cm">
          <draw:text-box>
            <text:p text:style-name="P32">Prueba 1 · ejemplo del enunciado</text:p>
          </draw:text-box>
        </draw:frame>
        <draw:frame draw:style-name="gr20" draw:text-style-name="P35" draw:layer="layout" svg:width="30.5cm" svg:height="1.077cm" svg:x="1.25cm" svg:y="2.42cm">
          <draw:text-box>
            <text:p text:style-name="P34">Cargar MPL · generar DZN · resolver con HiGHS · revisar 7 verificaciones</text:p>
          </draw:text-box>
        </draw:frame>
        <draw:rect draw:style-name="gr5" draw:text-style-name="P8" draw:layer="layout" svg:width="31cm" svg:height="0.02cm" svg:x="1.25cm" svg:y="3.23cm">
          <text:p/>
        </draw:rect>
        <draw:rect draw:style-name="gr32" draw:text-style-name="P1" draw:layer="layout" svg:width="8.8cm" svg:height="0.62cm" svg:x="1.25cm" svg:y="3.65cm" draw:corner-radius="0.04cm">
          <text:p/>
        </draw:rect>
        <draw:frame draw:style-name="gr30" draw:text-style-name="P130" draw:layer="layout" svg:width="8.56cm" svg:height="0.977cm" svg:x="1.37cm" svg:y="3.755cm">
          <draw:text-box>
            <text:p text:style-name="P129">INICIAL <text:s/>[12, 4, 0, 4, 0]</text:p>
          </draw:text-box>
        </draw:frame>
        <draw:line draw:style-name="gr22" draw:text-style-name="P40" draw:layer="layout" svg:x1="10.5cm" svg:y1="3.95cm" svg:x2="13.1cm" svg:y2="3.95cm">
          <text:p/>
        </draw:line>
        <draw:rect draw:style-name="gr38" draw:text-style-name="P1" draw:layer="layout" svg:width="9.8cm" svg:height="0.62cm" svg:x="13.6cm" svg:y="3.65cm" draw:corner-radius="0.04cm">
          <text:p/>
        </draw:rect>
        <draw:frame draw:style-name="gr30" draw:text-style-name="P152" draw:layer="layout" svg:width="9.56cm" svg:height="0.977cm" svg:x="13.72cm" svg:y="3.755cm">
          <draw:text-box>
            <text:p text:style-name="P151">FINAL <text:s/>[18, 2, 0, 0, 0]</text:p>
          </draw:text-box>
        </draw:frame>
        <draw:frame draw:style-name="gr20" draw:text-style-name="P154" draw:layer="layout" svg:width="23.5cm" svg:height="1.2cm" svg:x="5cm" svg:y="5.3cm">
          <draw:text-box>
            <text:p text:style-name="P153">4× (2→1) <text:s/>· <text:s/>2× (4→1) <text:s/>· <text:s/>2× (4→2)</text:p>
          </draw:text-box>
        </draw:frame>
        <draw:rect draw:style-name="gr24" draw:text-style-name="P15" draw:layer="layout" svg:width="7.3cm" svg:height="1.85cm" svg:x="1.25cm" svg:y="6.9cm" draw:corner-radius="0.04cm">
          <text:p/>
        </draw:rect>
        <draw:frame draw:style-name="gr20" draw:text-style-name="P118" draw:layer="layout" svg:width="7.1cm" svg:height="1.394cm" svg:x="1.35cm" svg:y="7.08cm">
          <draw:text-box>
            <text:p text:style-name="P117">19.2 / 20</text:p>
          </draw:text-box>
        </draw:frame>
        <draw:frame draw:style-name="gr20" draw:text-style-name="P116" draw:layer="layout" svg:width="7.1cm" svg:height="1.077cm" svg:x="1.35cm" svg:y="8.07cm">
          <draw:text-box>
            <text:p text:style-name="P115">costo</text:p>
          </draw:text-box>
        </draw:frame>
        <draw:rect draw:style-name="gr24" draw:text-style-name="P15" draw:layer="layout" svg:width="7.3cm" svg:height="1.85cm" svg:x="9.15cm" svg:y="6.9cm" draw:corner-radius="0.04cm">
          <text:p/>
        </draw:rect>
        <draw:frame draw:style-name="gr20" draw:text-style-name="P120" draw:layer="layout" svg:width="7.1cm" svg:height="1.394cm" svg:x="9.25cm" svg:y="7.08cm">
          <draw:text-box>
            <text:p text:style-name="P119">14 / 18</text:p>
          </draw:text-box>
        </draw:frame>
        <draw:frame draw:style-name="gr20" draw:text-style-name="P116" draw:layer="layout" svg:width="7.1cm" svg:height="1.077cm" svg:x="9.25cm" svg:y="8.07cm">
          <draw:text-box>
            <text:p text:style-name="P115">movimientos</text:p>
          </draw:text-box>
        </draw:frame>
        <draw:rect draw:style-name="gr24" draw:text-style-name="P15" draw:layer="layout" svg:width="7.3cm" svg:height="1.85cm" svg:x="17.05cm" svg:y="6.9cm" draw:corner-radius="0.04cm">
          <text:p/>
        </draw:rect>
        <draw:frame draw:style-name="gr20" draw:text-style-name="P114" draw:layer="layout" svg:width="7.1cm" svg:height="1.394cm" svg:x="17.15cm" svg:y="7.08cm">
          <draw:text-box>
            <text:p text:style-name="P113">0</text:p>
          </draw:text-box>
        </draw:frame>
        <draw:frame draw:style-name="gr20" draw:text-style-name="P116" draw:layer="layout" svg:width="7.1cm" svg:height="1.077cm" svg:x="17.15cm" svg:y="8.07cm">
          <draw:text-box>
            <text:p text:style-name="P115">mediana</text:p>
          </draw:text-box>
        </draw:frame>
        <draw:rect draw:style-name="gr24" draw:text-style-name="P15" draw:layer="layout" svg:width="7.3cm" svg:height="1.85cm" svg:x="24.95cm" svg:y="6.9cm" draw:corner-radius="0.04cm">
          <text:p/>
        </draw:rect>
        <draw:frame draw:style-name="gr20" draw:text-style-name="P122" draw:layer="layout" svg:width="7.1cm" svg:height="1.394cm" svg:x="25.05cm" svg:y="7.08cm">
          <draw:text-box>
            <text:p text:style-name="P121">0.5</text:p>
          </draw:text-box>
        </draw:frame>
        <draw:frame draw:style-name="gr20" draw:text-style-name="P116" draw:layer="layout" svg:width="7.1cm" svg:height="1.077cm" svg:x="25.05cm" svg:y="8.07cm">
          <draw:text-box>
            <text:p text:style-name="P115">polarización</text:p>
          </draw:text-box>
        </draw:frame>
        <draw:rect draw:style-name="gr24" draw:text-style-name="P15" draw:layer="layout" svg:width="14.9cm" svg:height="3.6cm" svg:x="1.25cm" svg:y="9.3cm" draw:corner-radius="0.04cm">
          <text:p/>
        </draw:rect>
        <draw:rect draw:style-name="gr3" draw:text-style-name="P3" draw:layer="layout" svg:width="0.07cm" svg:height="3.6cm" svg:x="1.25cm" svg:y="9.3cm">
          <text:p/>
        </draw:rect>
        <draw:frame draw:style-name="gr20" draw:text-style-name="P55" draw:layer="layout" svg:width="14.25cm" svg:height="1.2cm" svg:x="1.61cm" svg:y="9.56cm">
          <draw:text-box>
            <text:p text:style-name="P54">COMPROBACIÓN</text:p>
          </draw:text-box>
        </draw:frame>
        <draw:frame draw:style-name="gr20" draw:text-style-name="P80" draw:layer="layout" svg:width="14.25cm" svg:height="1.961cm" svg:x="1.61cm" svg:y="10.28cm">
          <draw:text-box>
            <text:p text:style-name="P79">Costo: 4.8 + 9.6 + 4.8 = 19.2</text:p>
            <text:p text:style-name="P79">Movs.: 4 + 6 + 4 = 14</text:p>
          </draw:text-box>
        </draw:frame>
        <draw:rect draw:style-name="gr24" draw:text-style-name="P15" draw:layer="layout" svg:width="15.35cm" svg:height="3.6cm" svg:x="16.9cm" svg:y="9.3cm" draw:corner-radius="0.04cm">
          <text:p/>
        </draw:rect>
        <draw:rect draw:style-name="gr25" draw:text-style-name="P47" draw:layer="layout" svg:width="0.07cm" svg:height="3.6cm" svg:x="16.9cm" svg:y="9.3cm">
          <text:p/>
        </draw:rect>
        <draw:frame draw:style-name="gr20" draw:text-style-name="P49" draw:layer="layout" svg:width="14.7cm" svg:height="1.2cm" svg:x="17.26cm" svg:y="9.56cm">
          <draw:text-box>
            <text:p text:style-name="P48">MEJORA CERTIFICADA</text:p>
          </draw:text-box>
        </draw:frame>
        <draw:frame draw:style-name="gr20" draw:text-style-name="P80" draw:layer="layout" svg:width="14.7cm" svg:height="1.961cm" svg:x="17.26cm" svg:y="10.28cm">
          <draw:text-box>
            <text:p text:style-name="P79">Polarización 4 → 0.5 <text:s/>(−87.5 %)</text:p>
            <text:p text:style-name="P79">447 distribuciones factibles enumeradas</text:p>
          </draw:text-box>
        </draw:frame>
        <draw:rect draw:style-name="gr38" draw:text-style-name="P1" draw:layer="layout" svg:width="22.4cm" svg:height="0.62cm" svg:x="5.7cm" svg:y="13.9cm" draw:corner-radius="0.04cm">
          <text:p/>
        </draw:rect>
        <draw:frame draw:style-name="gr30" draw:text-style-name="P152" draw:layer="layout" svg:width="22.16cm" svg:height="0.977cm" svg:x="5.82cm" svg:y="14.005cm">
          <draw:text-box>
            <text:p text:style-name="P151">DOMINIO · BALANCE · PRESUPUESTO · maxM · MEDIANA</text:p>
          </draw:text-box>
        </draw:frame>
        <presentation:notes draw:style-name="dp2">
          <draw:page-thumbnail draw:style-name="gr19" draw:layer="layout" svg:width="19.798cm" svg:height="11.136cm" svg:x="0.6cm" svg:y="2.257cm" draw:page-number="13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rect draw:style-name="gr1" draw:text-style-name="P1" draw:layer="layout" svg:width="33.867cm" svg:height="19.05cm" svg:x="0cm" svg:y="0cm">
          <text:p/>
        </draw:rect>
        <draw:rect draw:style-name="gr2" draw:text-style-name="P2" draw:layer="layout" svg:width="33.867cm" svg:height="0.17cm" svg:x="0cm" svg:y="0cm">
          <text:p/>
        </draw:rect>
        <draw:rect draw:style-name="gr25" draw:text-style-name="P47" draw:layer="layout" svg:width="33.867cm" svg:height="0.055cm" svg:x="0cm" svg:y="0.17cm">
          <text:p/>
        </draw:rect>
        <draw:frame draw:style-name="gr20" draw:text-style-name="P5" draw:layer="layout" svg:width="0.9cm" svg:height="1.077cm" svg:x="1.18cm" svg:y="18.16cm">
          <draw:text-box>
            <text:p text:style-name="P4">14</text:p>
          </draw:text-box>
        </draw:frame>
        <draw:frame draw:style-name="gr20" draw:text-style-name="P7" draw:layer="layout" svg:width="12cm" svg:height="1.077cm" svg:x="2.2cm" svg:y="18.16cm">
          <draw:text-box>
            <text:p text:style-name="P6">Estiven Andres Martinez Granados <text:s/>· <text:s/>10:15–11:05</text:p>
          </draw:text-box>
        </draw:frame>
        <draw:rect draw:style-name="gr5" draw:text-style-name="P8" draw:layer="layout" svg:width="5.6cm" svg:height="0.06cm" svg:x="26.9cm" svg:y="18.33cm">
          <text:p/>
        </draw:rect>
        <draw:rect draw:style-name="gr25" draw:text-style-name="P47" draw:layer="layout" svg:width="5.6cm" svg:height="0.06cm" svg:x="26.9cm" svg:y="18.33cm">
          <text:p/>
        </draw:rect>
        <draw:frame draw:style-name="gr20" draw:text-style-name="P25" draw:layer="layout" svg:width="7.2cm" svg:height="1.077cm" svg:x="1.25cm" svg:y="0.7cm">
          <draw:text-box>
            <text:p text:style-name="P24">4 · PRUEBAS Y CONCLUSIONES</text:p>
          </draw:text-box>
        </draw:frame>
        <draw:frame draw:style-name="gr20" draw:text-style-name="P33" draw:layer="layout" svg:width="31cm" svg:height="1.538cm" svg:x="1.18cm" svg:y="1.28cm">
          <draw:text-box>
            <text:p text:style-name="P32">Prueba 2 · consenso alcanzable</text:p>
          </draw:text-box>
        </draw:frame>
        <draw:frame draw:style-name="gr20" draw:text-style-name="P35" draw:layer="layout" svg:width="30.5cm" svg:height="1.077cm" svg:x="1.25cm" svg:y="2.42cm">
          <draw:text-box>
            <text:p text:style-name="P34">Tres personas recorren dos posiciones y consumen todo maxM</text:p>
          </draw:text-box>
        </draw:frame>
        <draw:rect draw:style-name="gr5" draw:text-style-name="P8" draw:layer="layout" svg:width="31cm" svg:height="0.02cm" svg:x="1.25cm" svg:y="3.23cm">
          <text:p/>
        </draw:rect>
        <draw:rect draw:style-name="gr32" draw:text-style-name="P1" draw:layer="layout" svg:width="8.2cm" svg:height="0.62cm" svg:x="1.25cm" svg:y="3.65cm" draw:corner-radius="0.04cm">
          <text:p/>
        </draw:rect>
        <draw:frame draw:style-name="gr30" draw:text-style-name="P130" draw:layer="layout" svg:width="7.96cm" svg:height="0.977cm" svg:x="1.37cm" svg:y="3.755cm">
          <draw:text-box>
            <text:p text:style-name="P129">INICIAL <text:s/>[7, 0, 3, 0]</text:p>
          </draw:text-box>
        </draw:frame>
        <draw:line draw:style-name="gr22" draw:text-style-name="P40" draw:layer="layout" svg:x1="10.1cm" svg:y1="3.95cm" svg:x2="12.9cm" svg:y2="3.95cm">
          <text:p/>
        </draw:line>
        <draw:rect draw:style-name="gr38" draw:text-style-name="P1" draw:layer="layout" svg:width="9cm" svg:height="0.62cm" svg:x="13.5cm" svg:y="3.65cm" draw:corner-radius="0.04cm">
          <text:p/>
        </draw:rect>
        <draw:frame draw:style-name="gr30" draw:text-style-name="P152" draw:layer="layout" svg:width="8.76cm" svg:height="0.977cm" svg:x="13.62cm" svg:y="3.755cm">
          <draw:text-box>
            <text:p text:style-name="P151">FINAL <text:s/>[10, 0, 0, 0]</text:p>
          </draw:text-box>
        </draw:frame>
        <draw:rect draw:style-name="gr10" draw:text-style-name="P15" draw:layer="layout" svg:width="8.45cm" svg:height="1.15cm" svg:x="23.8cm" svg:y="3.4cm" draw:corner-radius="0.06cm">
          <text:p/>
        </draw:rect>
        <draw:frame draw:style-name="gr20" draw:text-style-name="P156" draw:layer="layout" svg:width="7.85cm" svg:height="1.077cm" svg:x="24.1cm" svg:y="3.69cm">
          <draw:text-box>
            <text:p text:style-name="P155">3 personas · 3 → 1</text:p>
          </draw:text-box>
        </draw:frame>
        <draw:rect draw:style-name="gr24" draw:text-style-name="P15" draw:layer="layout" svg:width="9.8cm" svg:height="4.7cm" svg:x="1.25cm" svg:y="5.9cm" draw:corner-radius="0.04cm">
          <text:p/>
        </draw:rect>
        <draw:rect draw:style-name="gr17" draw:text-style-name="P28" draw:layer="layout" svg:width="0.07cm" svg:height="4.7cm" svg:x="1.25cm" svg:y="5.9cm">
          <text:p/>
        </draw:rect>
        <draw:frame draw:style-name="gr20" draw:text-style-name="P53" draw:layer="layout" svg:width="9.15cm" svg:height="1.2cm" svg:x="1.61cm" svg:y="6.16cm">
          <draw:text-box>
            <text:p text:style-name="P52">PRESUPUESTO</text:p>
          </draw:text-box>
        </draw:frame>
        <draw:frame draw:style-name="gr20" draw:text-style-name="P51" draw:layer="layout" svg:width="9.15cm" svg:height="2.259cm" svg:x="1.61cm" svg:y="6.88cm">
          <draw:text-box>
            <text:p text:style-name="P50">3 × costo efectivo</text:p>
            <text:p text:style-name="P50">= 11.7 ≤ 12</text:p>
          </draw:text-box>
        </draw:frame>
        <draw:rect draw:style-name="gr24" draw:text-style-name="P15" draw:layer="layout" svg:width="9.8cm" svg:height="4.7cm" svg:x="12cm" svg:y="5.9cm" draw:corner-radius="0.04cm">
          <text:p/>
        </draw:rect>
        <draw:rect draw:style-name="gr26" draw:text-style-name="P58" draw:layer="layout" svg:width="0.07cm" svg:height="4.7cm" svg:x="12cm" svg:y="5.9cm">
          <text:p/>
        </draw:rect>
        <draw:frame draw:style-name="gr20" draw:text-style-name="P60" draw:layer="layout" svg:width="9.15cm" svg:height="1.2cm" svg:x="12.36cm" svg:y="6.16cm">
          <draw:text-box>
            <text:p text:style-name="P59">DISTANCIA</text:p>
          </draw:text-box>
        </draw:frame>
        <draw:frame draw:style-name="gr20" draw:text-style-name="P51" draw:layer="layout" svg:width="9.15cm" svg:height="2.259cm" svg:x="12.36cm" svg:y="6.88cm">
          <draw:text-box>
            <text:p text:style-name="P50">3 × |1−3|</text:p>
            <text:p text:style-name="P50">= 6 = maxM</text:p>
          </draw:text-box>
        </draw:frame>
        <draw:rect draw:style-name="gr24" draw:text-style-name="P15" draw:layer="layout" svg:width="9.5cm" svg:height="4.7cm" svg:x="22.75cm" svg:y="5.9cm" draw:corner-radius="0.04cm">
          <text:p/>
        </draw:rect>
        <draw:rect draw:style-name="gr25" draw:text-style-name="P47" draw:layer="layout" svg:width="0.07cm" svg:height="4.7cm" svg:x="22.75cm" svg:y="5.9cm">
          <text:p/>
        </draw:rect>
        <draw:frame draw:style-name="gr20" draw:text-style-name="P49" draw:layer="layout" svg:width="8.85cm" svg:height="1.2cm" svg:x="23.11cm" svg:y="6.16cm">
          <draw:text-box>
            <text:p text:style-name="P48">OBJETIVO</text:p>
          </draw:text-box>
        </draw:frame>
        <draw:frame draw:style-name="gr20" draw:text-style-name="P51" draw:layer="layout" svg:width="8.85cm" svg:height="2.259cm" svg:x="23.11cm" svg:y="6.88cm">
          <draw:text-box>
            <text:p text:style-name="P50">10 × |0−0|</text:p>
            <text:p text:style-name="P50">= 0</text:p>
          </draw:text-box>
        </draw:frame>
        <draw:rect draw:style-name="gr28" draw:text-style-name="P64" draw:layer="layout" svg:width="31cm" svg:height="2.4cm" svg:x="1.25cm" svg:y="11.8cm" draw:corner-radius="0.06cm">
          <text:p/>
        </draw:rect>
        <draw:frame draw:style-name="gr20" draw:text-style-name="P49" draw:layer="layout" svg:width="5.6cm" svg:height="1.2cm" svg:x="2.3cm" svg:y="12.3cm">
          <draw:text-box>
            <text:p text:style-name="P48">CONSENSO</text:p>
          </draw:text-box>
        </draw:frame>
        <draw:frame draw:style-name="gr20" draw:text-style-name="P158" draw:layer="layout" svg:width="23.4cm" svg:height="1.961cm" svg:x="7.7cm" svg:y="12.25cm">
          <draw:text-box>
            <text:p text:style-name="P157">Es posible solo si una concentración completa respeta ct y maxM simultáneamente.</text:p>
          </draw:text-box>
        </draw:frame>
        <presentation:notes draw:style-name="dp2">
          <draw:page-thumbnail draw:style-name="gr19" draw:layer="layout" svg:width="19.798cm" svg:height="11.136cm" svg:x="0.6cm" svg:y="2.257cm" draw:page-number="14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rect draw:style-name="gr1" draw:text-style-name="P1" draw:layer="layout" svg:width="33.867cm" svg:height="19.05cm" svg:x="0cm" svg:y="0cm">
          <text:p/>
        </draw:rect>
        <draw:rect draw:style-name="gr2" draw:text-style-name="P2" draw:layer="layout" svg:width="33.867cm" svg:height="0.17cm" svg:x="0cm" svg:y="0cm">
          <text:p/>
        </draw:rect>
        <draw:rect draw:style-name="gr25" draw:text-style-name="P47" draw:layer="layout" svg:width="33.867cm" svg:height="0.055cm" svg:x="0cm" svg:y="0.17cm">
          <text:p/>
        </draw:rect>
        <draw:frame draw:style-name="gr20" draw:text-style-name="P5" draw:layer="layout" svg:width="0.9cm" svg:height="1.077cm" svg:x="1.18cm" svg:y="18.16cm">
          <draw:text-box>
            <text:p text:style-name="P4">15</text:p>
          </draw:text-box>
        </draw:frame>
        <draw:frame draw:style-name="gr20" draw:text-style-name="P7" draw:layer="layout" svg:width="12cm" svg:height="1.077cm" svg:x="2.2cm" svg:y="18.16cm">
          <draw:text-box>
            <text:p text:style-name="P6">Estiven Andres Martinez Granados <text:s/>· <text:s/>11:05–12:00</text:p>
          </draw:text-box>
        </draw:frame>
        <draw:rect draw:style-name="gr5" draw:text-style-name="P8" draw:layer="layout" svg:width="5.6cm" svg:height="0.06cm" svg:x="26.9cm" svg:y="18.33cm">
          <text:p/>
        </draw:rect>
        <draw:rect draw:style-name="gr25" draw:text-style-name="P47" draw:layer="layout" svg:width="5.6cm" svg:height="0.06cm" svg:x="26.9cm" svg:y="18.33cm">
          <text:p/>
        </draw:rect>
        <draw:frame draw:style-name="gr20" draw:text-style-name="P25" draw:layer="layout" svg:width="7.2cm" svg:height="1.077cm" svg:x="1.25cm" svg:y="0.7cm">
          <draw:text-box>
            <text:p text:style-name="P24">4 · PRUEBAS Y CONCLUSIONES</text:p>
          </draw:text-box>
        </draw:frame>
        <draw:frame draw:style-name="gr20" draw:text-style-name="P33" draw:layer="layout" svg:width="31cm" svg:height="1.538cm" svg:x="1.18cm" svg:y="1.28cm">
          <draw:text-box>
            <text:p text:style-name="P32">Qué demostramos</text:p>
          </draw:text-box>
        </draw:frame>
        <draw:frame draw:style-name="gr20" draw:text-style-name="P35" draw:layer="layout" svg:width="30.5cm" svg:height="1.077cm" svg:x="1.25cm" svg:y="2.42cm">
          <draw:text-box>
            <text:p text:style-name="P34">Movimientos factibles, auditables y óptimos para las instancias evaluadas</text:p>
          </draw:text-box>
        </draw:frame>
        <draw:rect draw:style-name="gr5" draw:text-style-name="P8" draw:layer="layout" svg:width="31cm" svg:height="0.02cm" svg:x="1.25cm" svg:y="3.23cm">
          <text:p/>
        </draw:rect>
        <draw:rect draw:style-name="gr10" draw:text-style-name="P15" draw:layer="layout" svg:width="9.7cm" svg:height="3.3cm" svg:x="1.25cm" svg:y="3.9cm" draw:corner-radius="0.06cm">
          <text:p/>
        </draw:rect>
        <draw:frame draw:style-name="gr20" draw:text-style-name="P160" draw:layer="layout" svg:width="1.4cm" svg:height="1.077cm" svg:x="1.55cm" svg:y="4.2cm">
          <draw:text-box>
            <text:p text:style-name="P159">01</text:p>
          </draw:text-box>
        </draw:frame>
        <draw:frame draw:style-name="gr20" draw:text-style-name="P162" draw:layer="layout" svg:width="7.6cm" svg:height="1.102cm" svg:x="3cm" svg:y="4.2cm">
          <draw:text-box>
            <text:p text:style-name="P161">Modelo exacto</text:p>
          </draw:text-box>
        </draw:frame>
        <draw:frame draw:style-name="gr20" draw:text-style-name="P86" draw:layer="layout" svg:width="9cm" svg:height="1.077cm" svg:x="1.6cm" svg:y="5.35cm">
          <draw:text-box>
            <text:p text:style-name="P85">IP/PLE con mediana linealizada</text:p>
          </draw:text-box>
        </draw:frame>
        <draw:rect draw:style-name="gr10" draw:text-style-name="P15" draw:layer="layout" svg:width="9.7cm" svg:height="3.3cm" svg:x="11.65cm" svg:y="3.9cm" draw:corner-radius="0.06cm">
          <text:p/>
        </draw:rect>
        <draw:frame draw:style-name="gr20" draw:text-style-name="P94" draw:layer="layout" svg:width="1.4cm" svg:height="1.077cm" svg:x="11.95cm" svg:y="4.2cm">
          <draw:text-box>
            <text:p text:style-name="P93">02</text:p>
          </draw:text-box>
        </draw:frame>
        <draw:frame draw:style-name="gr20" draw:text-style-name="P162" draw:layer="layout" svg:width="7.6cm" svg:height="1.102cm" svg:x="13.4cm" svg:y="4.2cm">
          <draw:text-box>
            <text:p text:style-name="P161">Factibilidad</text:p>
          </draw:text-box>
        </draw:frame>
        <draw:frame draw:style-name="gr20" draw:text-style-name="P86" draw:layer="layout" svg:width="9cm" svg:height="1.077cm" svg:x="12cm" svg:y="5.35cm">
          <draw:text-box>
            <text:p text:style-name="P85">Población, ct y maxM separados</text:p>
          </draw:text-box>
        </draw:frame>
        <draw:rect draw:style-name="gr10" draw:text-style-name="P15" draw:layer="layout" svg:width="9.7cm" svg:height="3.3cm" svg:x="22.05cm" svg:y="3.9cm" draw:corner-radius="0.06cm">
          <text:p/>
        </draw:rect>
        <draw:frame draw:style-name="gr20" draw:text-style-name="P164" draw:layer="layout" svg:width="1.4cm" svg:height="1.077cm" svg:x="22.35cm" svg:y="4.2cm">
          <draw:text-box>
            <text:p text:style-name="P163">03</text:p>
          </draw:text-box>
        </draw:frame>
        <draw:frame draw:style-name="gr20" draw:text-style-name="P162" draw:layer="layout" svg:width="7.6cm" svg:height="1.102cm" svg:x="23.8cm" svg:y="4.2cm">
          <draw:text-box>
            <text:p text:style-name="P161">Precisión</text:p>
          </draw:text-box>
        </draw:frame>
        <draw:frame draw:style-name="gr20" draw:text-style-name="P86" draw:layer="layout" svg:width="9cm" svg:height="1.673cm" svg:x="22.4cm" svg:y="5.35cm">
          <draw:text-box>
            <text:p text:style-name="P85">Escalamiento entero de decimales</text:p>
          </draw:text-box>
        </draw:frame>
        <draw:rect draw:style-name="gr10" draw:text-style-name="P15" draw:layer="layout" svg:width="14.95cm" svg:height="3.3cm" svg:x="1.25cm" svg:y="7.8cm" draw:corner-radius="0.06cm">
          <text:p/>
        </draw:rect>
        <draw:frame draw:style-name="gr20" draw:text-style-name="P166" draw:layer="layout" svg:width="1.4cm" svg:height="1.077cm" svg:x="1.55cm" svg:y="8.1cm">
          <draw:text-box>
            <text:p text:style-name="P165">04</text:p>
          </draw:text-box>
        </draw:frame>
        <draw:frame draw:style-name="gr20" draw:text-style-name="P162" draw:layer="layout" svg:width="12.85cm" svg:height="1.102cm" svg:x="3cm" svg:y="8.1cm">
          <draw:text-box>
            <text:p text:style-name="P161">Evidencia</text:p>
          </draw:text-box>
        </draw:frame>
        <draw:frame draw:style-name="gr20" draw:text-style-name="P86" draw:layer="layout" svg:width="14.25cm" svg:height="1.077cm" svg:x="1.6cm" svg:y="9.25cm">
          <draw:text-box>
            <text:p text:style-name="P85">30/30 entradas verificadas</text:p>
          </draw:text-box>
        </draw:frame>
        <draw:rect draw:style-name="gr10" draw:text-style-name="P15" draw:layer="layout" svg:width="14.95cm" svg:height="3.3cm" svg:x="16.8cm" svg:y="7.8cm" draw:corner-radius="0.06cm">
          <text:p/>
        </draw:rect>
        <draw:frame draw:style-name="gr20" draw:text-style-name="P168" draw:layer="layout" svg:width="1.4cm" svg:height="1.077cm" svg:x="17.1cm" svg:y="8.1cm">
          <draw:text-box>
            <text:p text:style-name="P167">05</text:p>
          </draw:text-box>
        </draw:frame>
        <draw:frame draw:style-name="gr20" draw:text-style-name="P162" draw:layer="layout" svg:width="12.85cm" svg:height="1.102cm" svg:x="18.55cm" svg:y="8.1cm">
          <draw:text-box>
            <text:p text:style-name="P161">Límite</text:p>
          </draw:text-box>
        </draw:frame>
        <draw:frame draw:style-name="gr20" draw:text-style-name="P86" draw:layer="layout" svg:width="14.25cm" svg:height="1.077cm" svg:x="17.15cm" svg:y="9.25cm">
          <draw:text-box>
            <text:p text:style-name="P85">Crecimiento cuadrático en m</text:p>
          </draw:text-box>
        </draw:frame>
        <draw:rect draw:style-name="gr33" draw:text-style-name="P131" draw:layer="layout" svg:width="30.5cm" svg:height="2.3cm" svg:x="1.25cm" svg:y="12.3cm" draw:corner-radius="0.06cm">
          <text:p/>
        </draw:rect>
        <draw:frame draw:style-name="gr20" draw:text-style-name="P170" draw:layer="layout" svg:width="4.5cm" svg:height="1.436cm" svg:x="1.85cm" svg:y="12.7cm">
          <draw:text-box>
            <text:p text:style-name="P169">MinPol</text:p>
          </draw:text-box>
        </draw:frame>
        <draw:frame draw:style-name="gr20" draw:text-style-name="P172" draw:layer="layout" svg:width="24.3cm" svg:height="1.077cm" svg:x="6.1cm" svg:y="12.75cm">
          <draw:text-box>
            <text:p text:style-name="P171">Brecha 0 % <text:s/>· <text:s/>verificación independiente <text:s/>· <text:s/>resultados reproducibles</text:p>
          </draw:text-box>
        </draw:frame>
        <draw:frame draw:style-name="gr20" draw:text-style-name="P174" draw:layer="layout" svg:width="30.5cm" svg:height="1.246cm" svg:x="1.25cm" svg:y="15cm">
          <draw:text-box>
            <text:p text:style-name="P173">Muchas gracias</text:p>
          </draw:text-box>
        </draw:frame>
        <presentation:notes draw:style-name="dp2">
          <draw:page-thumbnail draw:style-name="gr19" draw:layer="layout" svg:width="19.798cm" svg:height="11.136cm" svg:x="0.6cm" svg:y="2.257cm" draw:page-number="15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21T20:37:11.981110257</meta:creation-date>
    <dc:date>2026-07-21T20:37:17.250137049</dc:date>
    <meta:editing-duration>PT5S</meta:editing-duration>
    <meta:editing-cycles>1</meta:editing-cycles>
    <meta:document-statistic meta:object-count="636"/>
    <meta:generator>LibreOffice/25.8.7.3$Linux_X86_64 LibreOffice_project/580$Build-3</meta:generator>
  </office:meta>
</office:document-meta>
</file>